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09" table:style-name="ce1">
            <text:p>10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8" table:style-name="ce1">
            <text:p>23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5" table:style-name="ce1">
            <text:p>15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9" table:style-name="ce1">
            <text:p>99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6" table:style-name="ce1">
            <text:p>13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6" table:style-name="ce1">
            <text:p>14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0" table:style-name="ce1">
            <text:p>1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32" table:style-name="ce1">
            <text:p>13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Слава</meta:initial-creator>
    <dc:creator>Валентина Котельникова</dc:creator>
    <meta:creation-date>2021-07-09T17:04:06Z</meta:creation-date>
    <dc:date>2025-10-06T08:21:08Z</dc:date>
  </office:meta>
</office:document-meta>
</file>