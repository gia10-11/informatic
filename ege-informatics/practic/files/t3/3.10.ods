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4">
            <text:p>ID операции</text:p>
          </table:table-cell>
          <table:table-cell office:value-type="string" table:style-name="ce4">
            <text:p>Дата</text:p>
          </table:table-cell>
          <table:table-cell office:value-type="string" table:style-name="ce4">
            <text:p>ID магазина</text:p>
          </table:table-cell>
          <table:table-cell office:value-type="string" table:style-name="ce4">
            <text:p>Артикул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Количество упаковок, шт.</text:p>
          </table:table-cell>
          <table:table-cell office:value-type="string" table:style-name="ce4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65" table:style-name="ce1">
            <text:p>16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09" table:style-name="ce1">
            <text:p>10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5" table:style-name="ce1">
            <text:p>14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0" table:style-name="ce1">
            <text:p>14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50" table:style-name="ce1">
            <text:p>25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2" table:style-name="ce1">
            <text:p>242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8" table:style-name="ce1">
            <text:p>23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9" table:style-name="ce1">
            <text:p>149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5" table:style-name="ce1">
            <text:p>15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3" table:style-name="ce1">
            <text:p>12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9" table:style-name="ce1">
            <text:p>99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4" table:style-name="ce1">
            <text:p>15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6" table:style-name="ce1">
            <text:p>13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6" table:style-name="ce1">
            <text:p>14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68" table:style-name="ce1">
            <text:p>6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0" table:style-name="ce1">
            <text:p>13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32" table:style-name="ce1">
            <text:p>13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102" table:style-name="ce1">
            <text:p>102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6" table:style-name="ce1">
            <text:p>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1" table:style-name="ce1">
            <text:p>1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3" table:style-name="ce1">
            <text:p>13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4">
            <text:p>Артикул</text:p>
          </table:table-cell>
          <table:table-cell office:value-type="string" table:style-name="ce4">
            <text:p>Отдел</text:p>
          </table:table-cell>
          <table:table-cell office:value-type="string" table:style-name="ce4">
            <text:p>Наименование товара</text:p>
          </table:table-cell>
          <table:table-cell office:value-type="string" table:style-name="ce4">
            <text:p>Ед. изм</text:p>
          </table:table-cell>
          <table:table-cell office:value-type="string" table:style-name="ce4">
            <text:p>Количество в упаковке</text:p>
          </table:table-cell>
          <table:table-cell office:value-type="string" table:style-name="ce4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Слава</meta:initial-creator>
    <dc:creator>Валентина Котельникова</dc:creator>
    <meta:creation-date>2021-07-09T17:04:06Z</meta:creation-date>
    <dc:date>2025-10-06T08:22:45Z</dc:date>
  </office:meta>
</office:document-meta>
</file>