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" table:style-name="ta1">
        <table:table-column table:style-name="co1" table:number-columns-repeated="16384" table:default-cell-style-name="ce1"/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49" table:style-name="ce1">
            <text:p>4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96" table:style-name="ce1">
            <text:p>9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office:value-type="float" office:value="67" table:style-name="ce1">
            <text:p>6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73" table:style-name="ce1">
            <text:p>7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7" table:style-name="ce1">
            <text:p>17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8" table:style-name="ce1">
            <text:p>98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0" table:style-name="ce1">
            <text:p>30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2" table:style-name="ce1">
            <text:p>82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91" table:style-name="ce1">
            <text:p>9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27" table:style-name="ce1">
            <text:p>2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6" table:style-name="ce1">
            <text:p>86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97" table:style-name="ce1">
            <text:p>9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85" table:style-name="ce1">
            <text:p>8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3" table:style-name="ce1">
            <text:p>23</text:p>
          </table:table-cell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5" table:style-name="ce1">
            <text:p>75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58" table:style-name="ce1">
            <text:p>5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79" table:style-name="ce1">
            <text:p>79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3" table:style-name="ce1">
            <text:p>63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7" table:style-name="ce1">
            <text:p>97</text:p>
          </table:table-cell>
          <table:table-cell office:value-type="float" office:value="56" table:style-name="ce1">
            <text:p>56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71" table:style-name="ce1">
            <text:p>7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7" table:style-name="ce1">
            <text:p>67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office:value-type="float" office:value="83" table:style-name="ce1">
            <text:p>8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7" table:style-name="ce1">
            <text:p>47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office:value-type="float" office:value="62" table:style-name="ce1">
            <text:p>6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8" table:style-name="ce1">
            <text:p>98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89" table:style-name="ce1">
            <text:p>89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3" table:style-name="ce1">
            <text:p>83</text:p>
          </table:table-cell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1" table:style-name="ce1">
            <text:p>51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84" table:style-name="ce1">
            <text:p>8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93" table:style-name="ce1">
            <text:p>9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99" table:style-name="ce1">
            <text:p>99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2" table:style-name="ce1">
            <text:p>72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4" table:style-name="ce1">
            <text:p>84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7" table:style-name="ce1">
            <text:p>67</text:p>
          </table:table-cell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3" table:style-name="ce1">
            <text:p>93</text:p>
          </table:table-cell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20" table:style-name="ce1">
            <text:p>2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88" table:style-name="ce1">
            <text:p>8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86" table:style-name="ce1">
            <text:p>8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89" table:style-name="ce1">
            <text:p>8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3" table:style-name="ce1">
            <text:p>73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99" table:style-name="ce1">
            <text:p>9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62" table:style-name="ce1">
            <text:p>6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office:value-type="float" office:value="27" table:style-name="ce1">
            <text:p>2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83" table:style-name="ce1">
            <text:p>8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97" table:style-name="ce1">
            <text:p>9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6" table:style-name="ce1">
            <text:p>56</text:p>
          </table:table-cell>
          <table:table-cell office:value-type="float" office:value="81" table:style-name="ce1">
            <text:p>81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office:value-type="float" office:value="89" table:style-name="ce1">
            <text:p>8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9" table:style-name="ce1">
            <text:p>39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83" table:style-name="ce1">
            <text:p>8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office:value-type="float" office:value="57" table:style-name="ce1">
            <text:p>5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7" table:style-name="ce1">
            <text:p>97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7" table:style-name="ce1">
            <text:p>87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94" table:style-name="ce1">
            <text:p>9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4" table:style-name="ce1">
            <text:p>9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73" table:style-name="ce1">
            <text:p>7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" table:style-name="ce1">
            <text:p>52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5" table:style-name="ce1">
            <text:p>95</text:p>
          </table:table-cell>
          <table:table-cell office:value-type="float" office:value="39" table:style-name="ce1">
            <text:p>3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1" table:style-name="ce1">
            <text:p>91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office:value-type="float" office:value="44" table:style-name="ce1">
            <text:p>4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1" table:style-name="ce1">
            <text:p>91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office:value-type="float" office:value="79" table:style-name="ce1">
            <text:p>7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7" table:style-name="ce1">
            <text:p>97</text:p>
          </table:table-cell>
          <table:table-cell office:value-type="float" office:value="49" table:style-name="ce1">
            <text:p>49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55" table:style-name="ce1">
            <text:p>5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1" table:style-name="ce1">
            <text:p>71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8" table:style-name="ce1">
            <text:p>98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85" table:style-name="ce1">
            <text:p>8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86" table:style-name="ce1">
            <text:p>8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96" table:style-name="ce1">
            <text:p>9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4" table:style-name="ce1">
            <text:p>54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office:value-type="float" office:value="86" table:style-name="ce1">
            <text:p>8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85" table:style-name="ce1">
            <text:p>8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3" table:style-name="ce1">
            <text:p>83</text:p>
          </table:table-cell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86" table:style-name="ce1">
            <text:p>8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office:value-type="float" office:value="97" table:style-name="ce1">
            <text:p>97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number-rows-repeated="1043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1-08-23T05:47:07Z</meta:creation-date>
    <dc:date>2025-09-12T08:40:00Z</dc:date>
  </office:meta>
</office:document-meta>
</file>