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/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48708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5.08cm"/>
    </style:style>
    <style:style style:name="co9" style:family="table-column">
      <style:table-column-properties fo:break-before="auto" style:column-width="2.38125cm"/>
    </style:style>
    <style:style style:name="co10" style:family="table-column">
      <style:table-column-properties fo:break-before="auto" style:column-width="4.28625cm"/>
    </style:style>
    <style:style style:name="co11" style:family="table-column">
      <style:table-column-properties fo:break-before="auto" style:column-width="2.19604166666667cm"/>
    </style:style>
    <style:style style:name="co12" style:family="table-column">
      <style:table-column-properties fo:break-before="auto" style:column-width="3.04270833333333cm"/>
    </style:style>
    <style:style style:name="co13" style:family="table-column">
      <style:table-column-properties fo:break-before="auto" style:column-width="4.94770833333333cm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Движение_товаров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3">
            <text:p>ID операции</text:p>
          </table:table-cell>
          <table:table-cell office:value-type="string" table:style-name="ce3">
            <text:p>Дата</text:p>
          </table:table-cell>
          <table:table-cell office:value-type="string" table:style-name="ce3">
            <text:p>ID магазина</text:p>
          </table:table-cell>
          <table:table-cell office:value-type="string" table:style-name="ce3">
            <text:p>Артикул</text:p>
          </table:table-cell>
          <table:table-cell office:value-type="string" table:style-name="ce3">
            <text:p>Тип операции</text:p>
          </table:table-cell>
          <table:table-cell office:value-type="string" table:style-name="ce3">
            <text:p>Количество упаковок</text:p>
          </table:table-cell>
          <table:table-cell office:value-type="string" table:style-name="ce3">
            <text:p>Цена<text:s/></text:p>
          </table:table-cell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65" table:style-name="ce1">
            <text:p>16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79" table:style-name="ce1">
            <text:p>7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83" table:style-name="ce1">
            <text:p>8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87" table:style-name="ce1">
            <text:p>8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9" table:style-name="ce1">
            <text:p>8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3" table:style-name="ce1">
            <text:p>9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4" table:style-name="ce1">
            <text:p>9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5" table:style-name="ce1">
            <text:p>9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96" table:style-name="ce1">
            <text:p>9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97" table:style-name="ce1">
            <text:p>9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99" table:style-name="ce1">
            <text:p>9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11" table:style-name="ce1">
            <text:p>111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1" table:style-name="ce1">
            <text:p>10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02" table:style-name="ce1">
            <text:p>10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09" table:style-name="ce1">
            <text:p>10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03" table:style-name="ce1">
            <text:p>10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04" table:style-name="ce1">
            <text:p>10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14" table:style-name="ce1">
            <text:p>114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05" table:style-name="ce1">
            <text:p>10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06" table:style-name="ce1">
            <text:p>10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12" table:style-name="ce1">
            <text:p>112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07" table:style-name="ce1">
            <text:p>10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08" table:style-name="ce1">
            <text:p>10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09" table:style-name="ce1">
            <text:p>10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11" table:style-name="ce1">
            <text:p>11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12" table:style-name="ce1">
            <text:p>11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13" table:style-name="ce1">
            <text:p>11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4" table:style-name="ce1">
            <text:p>11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5" table:style-name="ce1">
            <text:p>11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16" table:style-name="ce1">
            <text:p>11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17" table:style-name="ce1">
            <text:p>11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18" table:style-name="ce1">
            <text:p>11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19" table:style-name="ce1">
            <text:p>11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21" table:style-name="ce1">
            <text:p>12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22" table:style-name="ce1">
            <text:p>12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23" table:style-name="ce1">
            <text:p>12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24" table:style-name="ce1">
            <text:p>12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25" table:style-name="ce1">
            <text:p>12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26" table:style-name="ce1">
            <text:p>12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27" table:style-name="ce1">
            <text:p>12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28" table:style-name="ce1">
            <text:p>12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29" table:style-name="ce1">
            <text:p>12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" table:style-name="ce1">
            <text:p>13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2" table:style-name="ce1">
            <text:p>13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3" table:style-name="ce1">
            <text:p>13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34" table:style-name="ce1">
            <text:p>13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35" table:style-name="ce1">
            <text:p>13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6" table:style-name="ce1">
            <text:p>13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7" table:style-name="ce1">
            <text:p>13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8" table:style-name="ce1">
            <text:p>13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9" table:style-name="ce1">
            <text:p>13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1" table:style-name="ce1">
            <text:p>14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42" table:style-name="ce1">
            <text:p>14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43" table:style-name="ce1">
            <text:p>14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44" table:style-name="ce1">
            <text:p>14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45" table:style-name="ce1">
            <text:p>14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46" table:style-name="ce1">
            <text:p>14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47" table:style-name="ce1">
            <text:p>14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48" table:style-name="ce1">
            <text:p>14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49" table:style-name="ce1">
            <text:p>14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51" table:style-name="ce1">
            <text:p>15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" table:style-name="ce1">
            <text:p>15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3" table:style-name="ce1">
            <text:p>15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54" table:style-name="ce1">
            <text:p>15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55" table:style-name="ce1">
            <text:p>15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56" table:style-name="ce1">
            <text:p>15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57" table:style-name="ce1">
            <text:p>15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58" table:style-name="ce1">
            <text:p>15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59" table:style-name="ce1">
            <text:p>15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1" table:style-name="ce1">
            <text:p>16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2" table:style-name="ce1">
            <text:p>16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3" table:style-name="ce1">
            <text:p>16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64" table:style-name="ce1">
            <text:p>16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65" table:style-name="ce1">
            <text:p>16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66" table:style-name="ce1">
            <text:p>16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67" table:style-name="ce1">
            <text:p>16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" table:style-name="ce1">
            <text:p>16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9" table:style-name="ce1">
            <text:p>16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0" table:style-name="ce1">
            <text:p>17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1" table:style-name="ce1">
            <text:p>17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2" table:style-name="ce1">
            <text:p>17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10" table:style-name="ce1">
            <text:p>11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3" table:style-name="ce1">
            <text:p>17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4" table:style-name="ce1">
            <text:p>17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5" table:style-name="ce1">
            <text:p>17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77" table:style-name="ce1">
            <text:p>17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8" table:style-name="ce1">
            <text:p>17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9" table:style-name="ce1">
            <text:p>17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81" table:style-name="ce1">
            <text:p>18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82" table:style-name="ce1">
            <text:p>18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83" table:style-name="ce1">
            <text:p>18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84" table:style-name="ce1">
            <text:p>18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85" table:style-name="ce1">
            <text:p>18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6" table:style-name="ce1">
            <text:p>18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7" table:style-name="ce1">
            <text:p>18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88" table:style-name="ce1">
            <text:p>18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89" table:style-name="ce1">
            <text:p>18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90" table:style-name="ce1">
            <text:p>19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91" table:style-name="ce1">
            <text:p>19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92" table:style-name="ce1">
            <text:p>19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93" table:style-name="ce1">
            <text:p>19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4" table:style-name="ce1">
            <text:p>19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5" table:style-name="ce1">
            <text:p>19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96" table:style-name="ce1">
            <text:p>19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97" table:style-name="ce1">
            <text:p>19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98" table:style-name="ce1">
            <text:p>19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99" table:style-name="ce1">
            <text:p>19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01" table:style-name="ce1">
            <text:p>20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" table:style-name="ce1">
            <text:p>20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" table:style-name="ce1">
            <text:p>20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" table:style-name="ce1">
            <text:p>20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5" table:style-name="ce1">
            <text:p>20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06" table:style-name="ce1">
            <text:p>20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07" table:style-name="ce1">
            <text:p>20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08" table:style-name="ce1">
            <text:p>20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09" table:style-name="ce1">
            <text:p>20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10" table:style-name="ce1">
            <text:p>21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11" table:style-name="ce1">
            <text:p>21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" table:style-name="ce1">
            <text:p>21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3" table:style-name="ce1">
            <text:p>21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" table:style-name="ce1">
            <text:p>21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" table:style-name="ce1">
            <text:p>21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6" table:style-name="ce1">
            <text:p>21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7" table:style-name="ce1">
            <text:p>21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" table:style-name="ce1">
            <text:p>21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9" table:style-name="ce1">
            <text:p>21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" table:style-name="ce1">
            <text:p>22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" table:style-name="ce1">
            <text:p>22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2" table:style-name="ce1">
            <text:p>22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3" table:style-name="ce1">
            <text:p>22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24" table:style-name="ce1">
            <text:p>22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25" table:style-name="ce1">
            <text:p>22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" table:style-name="ce1">
            <text:p>22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08" table:style-name="ce1">
            <text:p>10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7" table:style-name="ce1">
            <text:p>22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28" table:style-name="ce1">
            <text:p>22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29" table:style-name="ce1">
            <text:p>22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30" table:style-name="ce1">
            <text:p>23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16" table:style-name="ce1">
            <text:p>116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31" table:style-name="ce1">
            <text:p>23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2" table:style-name="ce1">
            <text:p>23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3" table:style-name="ce1">
            <text:p>23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34" table:style-name="ce1">
            <text:p>23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35" table:style-name="ce1">
            <text:p>23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36" table:style-name="ce1">
            <text:p>23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37" table:style-name="ce1">
            <text:p>23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38" table:style-name="ce1">
            <text:p>23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39" table:style-name="ce1">
            <text:p>23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40" table:style-name="ce1">
            <text:p>24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41" table:style-name="ce1">
            <text:p>24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42" table:style-name="ce1">
            <text:p>24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43" table:style-name="ce1">
            <text:p>24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44" table:style-name="ce1">
            <text:p>24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45" table:style-name="ce1">
            <text:p>24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46" table:style-name="ce1">
            <text:p>24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47" table:style-name="ce1">
            <text:p>24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48" table:style-name="ce1">
            <text:p>24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49" table:style-name="ce1">
            <text:p>24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50" table:style-name="ce1">
            <text:p>25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51" table:style-name="ce1">
            <text:p>25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52" table:style-name="ce1">
            <text:p>25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53" table:style-name="ce1">
            <text:p>25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54" table:style-name="ce1">
            <text:p>25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55" table:style-name="ce1">
            <text:p>25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56" table:style-name="ce1">
            <text:p>25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57" table:style-name="ce1">
            <text:p>25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58" table:style-name="ce1">
            <text:p>25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59" table:style-name="ce1">
            <text:p>25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60" table:style-name="ce1">
            <text:p>26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45" table:style-name="ce1">
            <text:p>145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61" table:style-name="ce1">
            <text:p>26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62" table:style-name="ce1">
            <text:p>26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63" table:style-name="ce1">
            <text:p>26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64" table:style-name="ce1">
            <text:p>26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65" table:style-name="ce1">
            <text:p>26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66" table:style-name="ce1">
            <text:p>26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67" table:style-name="ce1">
            <text:p>26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68" table:style-name="ce1">
            <text:p>26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69" table:style-name="ce1">
            <text:p>26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70" table:style-name="ce1">
            <text:p>27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71" table:style-name="ce1">
            <text:p>27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72" table:style-name="ce1">
            <text:p>27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73" table:style-name="ce1">
            <text:p>27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74" table:style-name="ce1">
            <text:p>27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75" table:style-name="ce1">
            <text:p>27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76" table:style-name="ce1">
            <text:p>27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77" table:style-name="ce1">
            <text:p>27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8" table:style-name="ce1">
            <text:p>27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9" table:style-name="ce1">
            <text:p>27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80" table:style-name="ce1">
            <text:p>28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81" table:style-name="ce1">
            <text:p>28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82" table:style-name="ce1">
            <text:p>28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83" table:style-name="ce1">
            <text:p>28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84" table:style-name="ce1">
            <text:p>28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85" table:style-name="ce1">
            <text:p>28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86" table:style-name="ce1">
            <text:p>28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87" table:style-name="ce1">
            <text:p>28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88" table:style-name="ce1">
            <text:p>28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89" table:style-name="ce1">
            <text:p>28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90" table:style-name="ce1">
            <text:p>29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91" table:style-name="ce1">
            <text:p>29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92" table:style-name="ce1">
            <text:p>29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93" table:style-name="ce1">
            <text:p>29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94" table:style-name="ce1">
            <text:p>29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95" table:style-name="ce1">
            <text:p>29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96" table:style-name="ce1">
            <text:p>29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97" table:style-name="ce1">
            <text:p>29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98" table:style-name="ce1">
            <text:p>29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99" table:style-name="ce1">
            <text:p>29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1" table:style-name="ce1">
            <text:p>30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3">
          <table:table-cell office:value-type="float" office:value="302" table:style-name="ce1">
            <text:p>30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3">
          <table:table-cell office:value-type="float" office:value="303" table:style-name="ce1">
            <text:p>30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04" table:style-name="ce1">
            <text:p>30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05" table:style-name="ce1">
            <text:p>30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06" table:style-name="ce1">
            <text:p>30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07" table:style-name="ce1">
            <text:p>30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08" table:style-name="ce1">
            <text:p>30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09" table:style-name="ce1">
            <text:p>30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10" table:style-name="ce1">
            <text:p>31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11" table:style-name="ce1">
            <text:p>31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12" table:style-name="ce1">
            <text:p>31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13" table:style-name="ce1">
            <text:p>31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14" table:style-name="ce1">
            <text:p>31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15" table:style-name="ce1">
            <text:p>31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16" table:style-name="ce1">
            <text:p>31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17" table:style-name="ce1">
            <text:p>31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18" table:style-name="ce1">
            <text:p>31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19" table:style-name="ce1">
            <text:p>31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20" table:style-name="ce1">
            <text:p>32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21" table:style-name="ce1">
            <text:p>32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22" table:style-name="ce1">
            <text:p>32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23" table:style-name="ce1">
            <text:p>32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24" table:style-name="ce1">
            <text:p>32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25" table:style-name="ce1">
            <text:p>32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6" table:style-name="ce1">
            <text:p>32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7" table:style-name="ce1">
            <text:p>32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28" table:style-name="ce1">
            <text:p>32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29" table:style-name="ce1">
            <text:p>32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30" table:style-name="ce1">
            <text:p>33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31" table:style-name="ce1">
            <text:p>33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32" table:style-name="ce1">
            <text:p>33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33" table:style-name="ce1">
            <text:p>33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34" table:style-name="ce1">
            <text:p>33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35" table:style-name="ce1">
            <text:p>33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36" table:style-name="ce1">
            <text:p>33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37" table:style-name="ce1">
            <text:p>33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38" table:style-name="ce1">
            <text:p>33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39" table:style-name="ce1">
            <text:p>33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0" table:style-name="ce1">
            <text:p>34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1" table:style-name="ce1">
            <text:p>34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42" table:style-name="ce1">
            <text:p>34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43" table:style-name="ce1">
            <text:p>34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44" table:style-name="ce1">
            <text:p>34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40" table:style-name="ce1">
            <text:p>14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45" table:style-name="ce1">
            <text:p>34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6" table:style-name="ce1">
            <text:p>34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7" table:style-name="ce1">
            <text:p>34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48" table:style-name="ce1">
            <text:p>34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49" table:style-name="ce1">
            <text:p>34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50" table:style-name="ce1">
            <text:p>35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51" table:style-name="ce1">
            <text:p>35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52" table:style-name="ce1">
            <text:p>35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53" table:style-name="ce1">
            <text:p>35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54" table:style-name="ce1">
            <text:p>35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55" table:style-name="ce1">
            <text:p>35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56" table:style-name="ce1">
            <text:p>35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57" table:style-name="ce1">
            <text:p>35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58" table:style-name="ce1">
            <text:p>35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59" table:style-name="ce1">
            <text:p>35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60" table:style-name="ce1">
            <text:p>36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61" table:style-name="ce1">
            <text:p>36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62" table:style-name="ce1">
            <text:p>36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63" table:style-name="ce1">
            <text:p>36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64" table:style-name="ce1">
            <text:p>36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65" table:style-name="ce1">
            <text:p>36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66" table:style-name="ce1">
            <text:p>36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67" table:style-name="ce1">
            <text:p>36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68" table:style-name="ce1">
            <text:p>36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69" table:style-name="ce1">
            <text:p>36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0" table:style-name="ce1">
            <text:p>37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1" table:style-name="ce1">
            <text:p>37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2" table:style-name="ce1">
            <text:p>37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3" table:style-name="ce1">
            <text:p>37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74" table:style-name="ce1">
            <text:p>37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75" table:style-name="ce1">
            <text:p>37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76" table:style-name="ce1">
            <text:p>37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77" table:style-name="ce1">
            <text:p>37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8" table:style-name="ce1">
            <text:p>37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9" table:style-name="ce1">
            <text:p>37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80" table:style-name="ce1">
            <text:p>38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81" table:style-name="ce1">
            <text:p>38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2" table:style-name="ce1">
            <text:p>38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3" table:style-name="ce1">
            <text:p>38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84" table:style-name="ce1">
            <text:p>38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85" table:style-name="ce1">
            <text:p>38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86" table:style-name="ce1">
            <text:p>38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87" table:style-name="ce1">
            <text:p>38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8" table:style-name="ce1">
            <text:p>38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9" table:style-name="ce1">
            <text:p>38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90" table:style-name="ce1">
            <text:p>39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91" table:style-name="ce1">
            <text:p>39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92" table:style-name="ce1">
            <text:p>39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93" table:style-name="ce1">
            <text:p>39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94" table:style-name="ce1">
            <text:p>39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11" table:style-name="ce1">
            <text:p>111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95" table:style-name="ce1">
            <text:p>39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96" table:style-name="ce1">
            <text:p>39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19" table:style-name="ce1">
            <text:p>11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97" table:style-name="ce1">
            <text:p>39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98" table:style-name="ce1">
            <text:p>39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99" table:style-name="ce1">
            <text:p>39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14" table:style-name="ce1">
            <text:p>114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01" table:style-name="ce1">
            <text:p>40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02" table:style-name="ce1">
            <text:p>40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03" table:style-name="ce1">
            <text:p>40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04" table:style-name="ce1">
            <text:p>40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05" table:style-name="ce1">
            <text:p>40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06" table:style-name="ce1">
            <text:p>40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07" table:style-name="ce1">
            <text:p>40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08" table:style-name="ce1">
            <text:p>40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09" table:style-name="ce1">
            <text:p>40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10" table:style-name="ce1">
            <text:p>41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11" table:style-name="ce1">
            <text:p>41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12" table:style-name="ce1">
            <text:p>41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13" table:style-name="ce1">
            <text:p>41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14" table:style-name="ce1">
            <text:p>41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15" table:style-name="ce1">
            <text:p>41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16" table:style-name="ce1">
            <text:p>41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17" table:style-name="ce1">
            <text:p>41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8" table:style-name="ce1">
            <text:p>41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9" table:style-name="ce1">
            <text:p>41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20" table:style-name="ce1">
            <text:p>42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21" table:style-name="ce1">
            <text:p>42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22" table:style-name="ce1">
            <text:p>42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23" table:style-name="ce1">
            <text:p>42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24" table:style-name="ce1">
            <text:p>42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25" table:style-name="ce1">
            <text:p>42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26" table:style-name="ce1">
            <text:p>42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27" table:style-name="ce1">
            <text:p>42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28" table:style-name="ce1">
            <text:p>42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29" table:style-name="ce1">
            <text:p>42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30" table:style-name="ce1">
            <text:p>43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31" table:style-name="ce1">
            <text:p>43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32" table:style-name="ce1">
            <text:p>43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33" table:style-name="ce1">
            <text:p>43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34" table:style-name="ce1">
            <text:p>43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35" table:style-name="ce1">
            <text:p>43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36" table:style-name="ce1">
            <text:p>43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37" table:style-name="ce1">
            <text:p>43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38" table:style-name="ce1">
            <text:p>43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39" table:style-name="ce1">
            <text:p>43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40" table:style-name="ce1">
            <text:p>44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41" table:style-name="ce1">
            <text:p>44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42" table:style-name="ce1">
            <text:p>44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43" table:style-name="ce1">
            <text:p>44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44" table:style-name="ce1">
            <text:p>44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45" table:style-name="ce1">
            <text:p>44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46" table:style-name="ce1">
            <text:p>44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47" table:style-name="ce1">
            <text:p>44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48" table:style-name="ce1">
            <text:p>44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49" table:style-name="ce1">
            <text:p>44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50" table:style-name="ce1">
            <text:p>45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51" table:style-name="ce1">
            <text:p>45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52" table:style-name="ce1">
            <text:p>45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53" table:style-name="ce1">
            <text:p>45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54" table:style-name="ce1">
            <text:p>45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55" table:style-name="ce1">
            <text:p>45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56" table:style-name="ce1">
            <text:p>45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57" table:style-name="ce1">
            <text:p>45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58" table:style-name="ce1">
            <text:p>45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59" table:style-name="ce1">
            <text:p>45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60" table:style-name="ce1">
            <text:p>46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61" table:style-name="ce1">
            <text:p>46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62" table:style-name="ce1">
            <text:p>46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63" table:style-name="ce1">
            <text:p>46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64" table:style-name="ce1">
            <text:p>46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65" table:style-name="ce1">
            <text:p>46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6" table:style-name="ce1">
            <text:p>46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7" table:style-name="ce1">
            <text:p>46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68" table:style-name="ce1">
            <text:p>46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69" table:style-name="ce1">
            <text:p>46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70" table:style-name="ce1">
            <text:p>47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71" table:style-name="ce1">
            <text:p>47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2" table:style-name="ce1">
            <text:p>47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38" table:style-name="ce1">
            <text:p>13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3" table:style-name="ce1">
            <text:p>47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74" table:style-name="ce1">
            <text:p>47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75" table:style-name="ce1">
            <text:p>47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76" table:style-name="ce1">
            <text:p>47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77" table:style-name="ce1">
            <text:p>47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78" table:style-name="ce1">
            <text:p>47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79" table:style-name="ce1">
            <text:p>47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80" table:style-name="ce1">
            <text:p>48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81" table:style-name="ce1">
            <text:p>48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82" table:style-name="ce1">
            <text:p>48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83" table:style-name="ce1">
            <text:p>48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84" table:style-name="ce1">
            <text:p>48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85" table:style-name="ce1">
            <text:p>48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86" table:style-name="ce1">
            <text:p>48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87" table:style-name="ce1">
            <text:p>48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4">
          <table:table-cell office:value-type="float" office:value="488" table:style-name="ce1">
            <text:p>48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4">
          <table:table-cell office:value-type="float" office:value="489" table:style-name="ce1">
            <text:p>48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90" table:style-name="ce1">
            <text:p>49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91" table:style-name="ce1">
            <text:p>49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92" table:style-name="ce1">
            <text:p>49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93" table:style-name="ce1">
            <text:p>49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94" table:style-name="ce1">
            <text:p>49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95" table:style-name="ce1">
            <text:p>49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96" table:style-name="ce1">
            <text:p>49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97" table:style-name="ce1">
            <text:p>49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98" table:style-name="ce1">
            <text:p>49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99" table:style-name="ce1">
            <text:p>49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00" table:style-name="ce1">
            <text:p>50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01" table:style-name="ce1">
            <text:p>50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02" table:style-name="ce1">
            <text:p>50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03" table:style-name="ce1">
            <text:p>50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04" table:style-name="ce1">
            <text:p>50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05" table:style-name="ce1">
            <text:p>50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06" table:style-name="ce1">
            <text:p>50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07" table:style-name="ce1">
            <text:p>50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08" table:style-name="ce1">
            <text:p>50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09" table:style-name="ce1">
            <text:p>50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10" table:style-name="ce1">
            <text:p>51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11" table:style-name="ce1">
            <text:p>51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12" table:style-name="ce1">
            <text:p>51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13" table:style-name="ce1">
            <text:p>51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14" table:style-name="ce1">
            <text:p>51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15" table:style-name="ce1">
            <text:p>51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16" table:style-name="ce1">
            <text:p>51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17" table:style-name="ce1">
            <text:p>51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18" table:style-name="ce1">
            <text:p>51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19" table:style-name="ce1">
            <text:p>51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20" table:style-name="ce1">
            <text:p>52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21" table:style-name="ce1">
            <text:p>52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22" table:style-name="ce1">
            <text:p>52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23" table:style-name="ce1">
            <text:p>52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24" table:style-name="ce1">
            <text:p>52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25" table:style-name="ce1">
            <text:p>52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26" table:style-name="ce1">
            <text:p>52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27" table:style-name="ce1">
            <text:p>52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28" table:style-name="ce1">
            <text:p>52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29" table:style-name="ce1">
            <text:p>52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30" table:style-name="ce1">
            <text:p>53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31" table:style-name="ce1">
            <text:p>53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32" table:style-name="ce1">
            <text:p>53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33" table:style-name="ce1">
            <text:p>53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34" table:style-name="ce1">
            <text:p>53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35" table:style-name="ce1">
            <text:p>53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36" table:style-name="ce1">
            <text:p>53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37" table:style-name="ce1">
            <text:p>53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38" table:style-name="ce1">
            <text:p>53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39" table:style-name="ce1">
            <text:p>53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40" table:style-name="ce1">
            <text:p>54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41" table:style-name="ce1">
            <text:p>54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42" table:style-name="ce1">
            <text:p>54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43" table:style-name="ce1">
            <text:p>54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44" table:style-name="ce1">
            <text:p>54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45" table:style-name="ce1">
            <text:p>54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46" table:style-name="ce1">
            <text:p>54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47" table:style-name="ce1">
            <text:p>54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48" table:style-name="ce1">
            <text:p>54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49" table:style-name="ce1">
            <text:p>54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0" table:style-name="ce1">
            <text:p>55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1" table:style-name="ce1">
            <text:p>55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52" table:style-name="ce1">
            <text:p>55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53" table:style-name="ce1">
            <text:p>55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54" table:style-name="ce1">
            <text:p>55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55" table:style-name="ce1">
            <text:p>55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6" table:style-name="ce1">
            <text:p>55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7" table:style-name="ce1">
            <text:p>55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8" table:style-name="ce1">
            <text:p>55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9" table:style-name="ce1">
            <text:p>55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60" table:style-name="ce1">
            <text:p>56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61" table:style-name="ce1">
            <text:p>56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62" table:style-name="ce1">
            <text:p>56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63" table:style-name="ce1">
            <text:p>56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64" table:style-name="ce1">
            <text:p>56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65" table:style-name="ce1">
            <text:p>56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66" table:style-name="ce1">
            <text:p>56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67" table:style-name="ce1">
            <text:p>56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68" table:style-name="ce1">
            <text:p>56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69" table:style-name="ce1">
            <text:p>56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70" table:style-name="ce1">
            <text:p>57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71" table:style-name="ce1">
            <text:p>57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72" table:style-name="ce1">
            <text:p>57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73" table:style-name="ce1">
            <text:p>57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74" table:style-name="ce1">
            <text:p>57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75" table:style-name="ce1">
            <text:p>57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76" table:style-name="ce1">
            <text:p>57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77" table:style-name="ce1">
            <text:p>57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78" table:style-name="ce1">
            <text:p>57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79" table:style-name="ce1">
            <text:p>57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0" table:style-name="ce1">
            <text:p>58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1" table:style-name="ce1">
            <text:p>58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82" table:style-name="ce1">
            <text:p>58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83" table:style-name="ce1">
            <text:p>58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84" table:style-name="ce1">
            <text:p>58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85" table:style-name="ce1">
            <text:p>58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86" table:style-name="ce1">
            <text:p>58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87" table:style-name="ce1">
            <text:p>58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8" table:style-name="ce1">
            <text:p>58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9" table:style-name="ce1">
            <text:p>58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90" table:style-name="ce1">
            <text:p>59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91" table:style-name="ce1">
            <text:p>59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2" table:style-name="ce1">
            <text:p>59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3" table:style-name="ce1">
            <text:p>59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4" table:style-name="ce1">
            <text:p>59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5" table:style-name="ce1">
            <text:p>59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96" table:style-name="ce1">
            <text:p>59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97" table:style-name="ce1">
            <text:p>59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8" table:style-name="ce1">
            <text:p>59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9" table:style-name="ce1">
            <text:p>59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01" table:style-name="ce1">
            <text:p>60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02" table:style-name="ce1">
            <text:p>60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03" table:style-name="ce1">
            <text:p>60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04" table:style-name="ce1">
            <text:p>60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05" table:style-name="ce1">
            <text:p>60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6" table:style-name="ce1">
            <text:p>60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7" table:style-name="ce1">
            <text:p>60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08" table:style-name="ce1">
            <text:p>60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09" table:style-name="ce1">
            <text:p>60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10" table:style-name="ce1">
            <text:p>61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11" table:style-name="ce1">
            <text:p>61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12" table:style-name="ce1">
            <text:p>61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13" table:style-name="ce1">
            <text:p>61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14" table:style-name="ce1">
            <text:p>61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15" table:style-name="ce1">
            <text:p>61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16" table:style-name="ce1">
            <text:p>61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17" table:style-name="ce1">
            <text:p>61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18" table:style-name="ce1">
            <text:p>61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19" table:style-name="ce1">
            <text:p>61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20" table:style-name="ce1">
            <text:p>62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21" table:style-name="ce1">
            <text:p>62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22" table:style-name="ce1">
            <text:p>62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23" table:style-name="ce1">
            <text:p>62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24" table:style-name="ce1">
            <text:p>62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25" table:style-name="ce1">
            <text:p>62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26" table:style-name="ce1">
            <text:p>62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27" table:style-name="ce1">
            <text:p>62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28" table:style-name="ce1">
            <text:p>62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29" table:style-name="ce1">
            <text:p>62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30" table:style-name="ce1">
            <text:p>63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31" table:style-name="ce1">
            <text:p>63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632" table:style-name="ce1">
            <text:p>63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633" table:style-name="ce1">
            <text:p>63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34" table:style-name="ce1">
            <text:p>63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35" table:style-name="ce1">
            <text:p>63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36" table:style-name="ce1">
            <text:p>63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37" table:style-name="ce1">
            <text:p>63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638" table:style-name="ce1">
            <text:p>63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87" table:style-name="ce1">
            <text:p>87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639" table:style-name="ce1">
            <text:p>63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40" table:style-name="ce1">
            <text:p>64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41" table:style-name="ce1">
            <text:p>64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42" table:style-name="ce1">
            <text:p>64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43" table:style-name="ce1">
            <text:p>64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44" table:style-name="ce1">
            <text:p>64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45" table:style-name="ce1">
            <text:p>64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46" table:style-name="ce1">
            <text:p>64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03" table:style-name="ce1">
            <text:p>103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47" table:style-name="ce1">
            <text:p>64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48" table:style-name="ce1">
            <text:p>64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11" table:style-name="ce1">
            <text:p>111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49" table:style-name="ce1">
            <text:p>64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50" table:style-name="ce1">
            <text:p>65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4" table:style-name="ce1">
            <text:p>124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51" table:style-name="ce1">
            <text:p>65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52" table:style-name="ce1">
            <text:p>65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03" table:style-name="ce1">
            <text:p>103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53" table:style-name="ce1">
            <text:p>65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54" table:style-name="ce1">
            <text:p>65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55" table:style-name="ce1">
            <text:p>65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56" table:style-name="ce1">
            <text:p>65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57" table:style-name="ce1">
            <text:p>65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58" table:style-name="ce1">
            <text:p>65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59" table:style-name="ce1">
            <text:p>65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60" table:style-name="ce1">
            <text:p>66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61" table:style-name="ce1">
            <text:p>66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62" table:style-name="ce1">
            <text:p>66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63" table:style-name="ce1">
            <text:p>66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64" table:style-name="ce1">
            <text:p>66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65" table:style-name="ce1">
            <text:p>66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66" table:style-name="ce1">
            <text:p>66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67" table:style-name="ce1">
            <text:p>66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68" table:style-name="ce1">
            <text:p>66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69" table:style-name="ce1">
            <text:p>66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70" table:style-name="ce1">
            <text:p>67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71" table:style-name="ce1">
            <text:p>67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72" table:style-name="ce1">
            <text:p>67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73" table:style-name="ce1">
            <text:p>67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74" table:style-name="ce1">
            <text:p>67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75" table:style-name="ce1">
            <text:p>67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76" table:style-name="ce1">
            <text:p>67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77" table:style-name="ce1">
            <text:p>67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8" table:style-name="ce1">
            <text:p>67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9" table:style-name="ce1">
            <text:p>67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80" table:style-name="ce1">
            <text:p>68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81" table:style-name="ce1">
            <text:p>68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82" table:style-name="ce1">
            <text:p>68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83" table:style-name="ce1">
            <text:p>68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84" table:style-name="ce1">
            <text:p>68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85" table:style-name="ce1">
            <text:p>68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86" table:style-name="ce1">
            <text:p>68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87" table:style-name="ce1">
            <text:p>68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88" table:style-name="ce1">
            <text:p>68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89" table:style-name="ce1">
            <text:p>68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90" table:style-name="ce1">
            <text:p>69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91" table:style-name="ce1">
            <text:p>69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92" table:style-name="ce1">
            <text:p>69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93" table:style-name="ce1">
            <text:p>69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94" table:style-name="ce1">
            <text:p>69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50" table:style-name="ce1">
            <text:p>25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95" table:style-name="ce1">
            <text:p>69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96" table:style-name="ce1">
            <text:p>69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97" table:style-name="ce1">
            <text:p>69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98" table:style-name="ce1">
            <text:p>69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99" table:style-name="ce1">
            <text:p>69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00" table:style-name="ce1">
            <text:p>70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28" table:style-name="ce1">
            <text:p>12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01" table:style-name="ce1">
            <text:p>70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02" table:style-name="ce1">
            <text:p>70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03" table:style-name="ce1">
            <text:p>70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04" table:style-name="ce1">
            <text:p>70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05" table:style-name="ce1">
            <text:p>70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06" table:style-name="ce1">
            <text:p>70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07" table:style-name="ce1">
            <text:p>70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08" table:style-name="ce1">
            <text:p>70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09" table:style-name="ce1">
            <text:p>70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10" table:style-name="ce1">
            <text:p>71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11" table:style-name="ce1">
            <text:p>71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12" table:style-name="ce1">
            <text:p>71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13" table:style-name="ce1">
            <text:p>71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14" table:style-name="ce1">
            <text:p>71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15" table:style-name="ce1">
            <text:p>71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16" table:style-name="ce1">
            <text:p>71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17" table:style-name="ce1">
            <text:p>71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18" table:style-name="ce1">
            <text:p>71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19" table:style-name="ce1">
            <text:p>71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20" table:style-name="ce1">
            <text:p>72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21" table:style-name="ce1">
            <text:p>72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22" table:style-name="ce1">
            <text:p>72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23" table:style-name="ce1">
            <text:p>72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24" table:style-name="ce1">
            <text:p>72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25" table:style-name="ce1">
            <text:p>72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26" table:style-name="ce1">
            <text:p>72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27" table:style-name="ce1">
            <text:p>72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28" table:style-name="ce1">
            <text:p>72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29" table:style-name="ce1">
            <text:p>72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30" table:style-name="ce1">
            <text:p>73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31" table:style-name="ce1">
            <text:p>73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32" table:style-name="ce1">
            <text:p>73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33" table:style-name="ce1">
            <text:p>73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34" table:style-name="ce1">
            <text:p>73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35" table:style-name="ce1">
            <text:p>73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36" table:style-name="ce1">
            <text:p>73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28" table:style-name="ce1">
            <text:p>12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37" table:style-name="ce1">
            <text:p>73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38" table:style-name="ce1">
            <text:p>73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39" table:style-name="ce1">
            <text:p>73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40" table:style-name="ce1">
            <text:p>74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41" table:style-name="ce1">
            <text:p>74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42" table:style-name="ce1">
            <text:p>74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43" table:style-name="ce1">
            <text:p>74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44" table:style-name="ce1">
            <text:p>74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45" table:style-name="ce1">
            <text:p>74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46" table:style-name="ce1">
            <text:p>74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47" table:style-name="ce1">
            <text:p>74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48" table:style-name="ce1">
            <text:p>74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49" table:style-name="ce1">
            <text:p>74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50" table:style-name="ce1">
            <text:p>75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51" table:style-name="ce1">
            <text:p>75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52" table:style-name="ce1">
            <text:p>75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53" table:style-name="ce1">
            <text:p>75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54" table:style-name="ce1">
            <text:p>75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55" table:style-name="ce1">
            <text:p>75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56" table:style-name="ce1">
            <text:p>75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57" table:style-name="ce1">
            <text:p>75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58" table:style-name="ce1">
            <text:p>75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59" table:style-name="ce1">
            <text:p>75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60" table:style-name="ce1">
            <text:p>76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61" table:style-name="ce1">
            <text:p>76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62" table:style-name="ce1">
            <text:p>76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63" table:style-name="ce1">
            <text:p>76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64" table:style-name="ce1">
            <text:p>76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65" table:style-name="ce1">
            <text:p>76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66" table:style-name="ce1">
            <text:p>76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67" table:style-name="ce1">
            <text:p>76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68" table:style-name="ce1">
            <text:p>76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69" table:style-name="ce1">
            <text:p>76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70" table:style-name="ce1">
            <text:p>77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71" table:style-name="ce1">
            <text:p>77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72" table:style-name="ce1">
            <text:p>77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73" table:style-name="ce1">
            <text:p>77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74" table:style-name="ce1">
            <text:p>77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3">
          <table:table-cell office:value-type="float" office:value="775" table:style-name="ce1">
            <text:p>77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3">
          <table:table-cell office:value-type="float" office:value="776" table:style-name="ce1">
            <text:p>77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77" table:style-name="ce1">
            <text:p>77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78" table:style-name="ce1">
            <text:p>77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79" table:style-name="ce1">
            <text:p>77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80" table:style-name="ce1">
            <text:p>78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81" table:style-name="ce1">
            <text:p>78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82" table:style-name="ce1">
            <text:p>78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83" table:style-name="ce1">
            <text:p>78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84" table:style-name="ce1">
            <text:p>78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28" table:style-name="ce1">
            <text:p>12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85" table:style-name="ce1">
            <text:p>78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86" table:style-name="ce1">
            <text:p>78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87" table:style-name="ce1">
            <text:p>78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88" table:style-name="ce1">
            <text:p>78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89" table:style-name="ce1">
            <text:p>78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90" table:style-name="ce1">
            <text:p>79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91" table:style-name="ce1">
            <text:p>79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92" table:style-name="ce1">
            <text:p>79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93" table:style-name="ce1">
            <text:p>79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94" table:style-name="ce1">
            <text:p>79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95" table:style-name="ce1">
            <text:p>79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96" table:style-name="ce1">
            <text:p>79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97" table:style-name="ce1">
            <text:p>79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98" table:style-name="ce1">
            <text:p>79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99" table:style-name="ce1">
            <text:p>79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00" table:style-name="ce1">
            <text:p>80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01" table:style-name="ce1">
            <text:p>80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02" table:style-name="ce1">
            <text:p>80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03" table:style-name="ce1">
            <text:p>80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04" table:style-name="ce1">
            <text:p>80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05" table:style-name="ce1">
            <text:p>80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06" table:style-name="ce1">
            <text:p>80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07" table:style-name="ce1">
            <text:p>80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08" table:style-name="ce1">
            <text:p>80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09" table:style-name="ce1">
            <text:p>80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10" table:style-name="ce1">
            <text:p>81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11" table:style-name="ce1">
            <text:p>81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12" table:style-name="ce1">
            <text:p>81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13" table:style-name="ce1">
            <text:p>81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14" table:style-name="ce1">
            <text:p>81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2" table:style-name="ce1">
            <text:p>242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15" table:style-name="ce1">
            <text:p>81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16" table:style-name="ce1">
            <text:p>81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17" table:style-name="ce1">
            <text:p>81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18" table:style-name="ce1">
            <text:p>81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19" table:style-name="ce1">
            <text:p>81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20" table:style-name="ce1">
            <text:p>82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21" table:style-name="ce1">
            <text:p>82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22" table:style-name="ce1">
            <text:p>82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23" table:style-name="ce1">
            <text:p>82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24" table:style-name="ce1">
            <text:p>82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25" table:style-name="ce1">
            <text:p>82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26" table:style-name="ce1">
            <text:p>82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27" table:style-name="ce1">
            <text:p>82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28" table:style-name="ce1">
            <text:p>82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38" table:style-name="ce1">
            <text:p>23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29" table:style-name="ce1">
            <text:p>82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30" table:style-name="ce1">
            <text:p>83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31" table:style-name="ce1">
            <text:p>83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32" table:style-name="ce1">
            <text:p>83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33" table:style-name="ce1">
            <text:p>83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34" table:style-name="ce1">
            <text:p>83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35" table:style-name="ce1">
            <text:p>83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36" table:style-name="ce1">
            <text:p>83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37" table:style-name="ce1">
            <text:p>83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38" table:style-name="ce1">
            <text:p>83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39" table:style-name="ce1">
            <text:p>83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40" table:style-name="ce1">
            <text:p>84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841" table:style-name="ce1">
            <text:p>84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4">
          <table:table-cell office:value-type="float" office:value="842" table:style-name="ce1">
            <text:p>84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43" table:style-name="ce1">
            <text:p>84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44" table:style-name="ce1">
            <text:p>84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45" table:style-name="ce1">
            <text:p>84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46" table:style-name="ce1">
            <text:p>84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47" table:style-name="ce1">
            <text:p>84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48" table:style-name="ce1">
            <text:p>84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49" table:style-name="ce1">
            <text:p>84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50" table:style-name="ce1">
            <text:p>85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51" table:style-name="ce1">
            <text:p>85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52" table:style-name="ce1">
            <text:p>85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53" table:style-name="ce1">
            <text:p>85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54" table:style-name="ce1">
            <text:p>85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55" table:style-name="ce1">
            <text:p>85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56" table:style-name="ce1">
            <text:p>85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28" table:style-name="ce1">
            <text:p>12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57" table:style-name="ce1">
            <text:p>85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58" table:style-name="ce1">
            <text:p>85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59" table:style-name="ce1">
            <text:p>85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60" table:style-name="ce1">
            <text:p>86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61" table:style-name="ce1">
            <text:p>86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62" table:style-name="ce1">
            <text:p>86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63" table:style-name="ce1">
            <text:p>86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4" table:style-name="ce1">
            <text:p>86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5" table:style-name="ce1">
            <text:p>86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66" table:style-name="ce1">
            <text:p>86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67" table:style-name="ce1">
            <text:p>86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8" table:style-name="ce1">
            <text:p>86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9" table:style-name="ce1">
            <text:p>86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70" table:style-name="ce1">
            <text:p>87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71" table:style-name="ce1">
            <text:p>87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872" table:style-name="ce1">
            <text:p>87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873" table:style-name="ce1">
            <text:p>87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874" table:style-name="ce1">
            <text:p>87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8" table:style-name="ce1">
            <text:p>98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875" table:style-name="ce1">
            <text:p>87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76" table:style-name="ce1">
            <text:p>87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77" table:style-name="ce1">
            <text:p>87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78" table:style-name="ce1">
            <text:p>87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79" table:style-name="ce1">
            <text:p>87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880" table:style-name="ce1">
            <text:p>88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881" table:style-name="ce1">
            <text:p>88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82" table:style-name="ce1">
            <text:p>88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83" table:style-name="ce1">
            <text:p>88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84" table:style-name="ce1">
            <text:p>88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85" table:style-name="ce1">
            <text:p>88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886" table:style-name="ce1">
            <text:p>88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887" table:style-name="ce1">
            <text:p>88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88" table:style-name="ce1">
            <text:p>88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89" table:style-name="ce1">
            <text:p>88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0" table:style-name="ce1">
            <text:p>89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1" table:style-name="ce1">
            <text:p>89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892" table:style-name="ce1">
            <text:p>89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893" table:style-name="ce1">
            <text:p>89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94" table:style-name="ce1">
            <text:p>89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1" table:style-name="ce1">
            <text:p>91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95" table:style-name="ce1">
            <text:p>89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6" table:style-name="ce1">
            <text:p>89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1" table:style-name="ce1">
            <text:p>51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7" table:style-name="ce1">
            <text:p>89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98" table:style-name="ce1">
            <text:p>89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99" table:style-name="ce1">
            <text:p>89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00" table:style-name="ce1">
            <text:p>90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4" table:style-name="ce1">
            <text:p>84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01" table:style-name="ce1">
            <text:p>90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02" table:style-name="ce1">
            <text:p>90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03" table:style-name="ce1">
            <text:p>90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04" table:style-name="ce1">
            <text:p>90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05" table:style-name="ce1">
            <text:p>90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06" table:style-name="ce1">
            <text:p>90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07" table:style-name="ce1">
            <text:p>90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8" table:style-name="ce1">
            <text:p>90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9" table:style-name="ce1">
            <text:p>90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10" table:style-name="ce1">
            <text:p>91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4" table:style-name="ce1">
            <text:p>11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11" table:style-name="ce1">
            <text:p>91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12" table:style-name="ce1">
            <text:p>91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13" table:style-name="ce1">
            <text:p>91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14" table:style-name="ce1">
            <text:p>91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15" table:style-name="ce1">
            <text:p>91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16" table:style-name="ce1">
            <text:p>91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17" table:style-name="ce1">
            <text:p>91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18" table:style-name="ce1">
            <text:p>91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19" table:style-name="ce1">
            <text:p>91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20" table:style-name="ce1">
            <text:p>92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21" table:style-name="ce1">
            <text:p>92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22" table:style-name="ce1">
            <text:p>92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71" table:style-name="ce1">
            <text:p>71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23" table:style-name="ce1">
            <text:p>92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24" table:style-name="ce1">
            <text:p>92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25" table:style-name="ce1">
            <text:p>92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26" table:style-name="ce1">
            <text:p>92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27" table:style-name="ce1">
            <text:p>92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28" table:style-name="ce1">
            <text:p>92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29" table:style-name="ce1">
            <text:p>92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30" table:style-name="ce1">
            <text:p>93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31" table:style-name="ce1">
            <text:p>93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32" table:style-name="ce1">
            <text:p>93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4">
          <table:table-cell office:value-type="float" office:value="933" table:style-name="ce1">
            <text:p>93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4">
          <table:table-cell office:value-type="float" office:value="934" table:style-name="ce1">
            <text:p>93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35" table:style-name="ce1">
            <text:p>93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36" table:style-name="ce1">
            <text:p>93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8" table:style-name="ce1">
            <text:p>13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37" table:style-name="ce1">
            <text:p>93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38" table:style-name="ce1">
            <text:p>93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39" table:style-name="ce1">
            <text:p>93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40" table:style-name="ce1">
            <text:p>94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07" table:style-name="ce1">
            <text:p>107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41" table:style-name="ce1">
            <text:p>94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42" table:style-name="ce1">
            <text:p>94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43" table:style-name="ce1">
            <text:p>94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44" table:style-name="ce1">
            <text:p>94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45" table:style-name="ce1">
            <text:p>94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46" table:style-name="ce1">
            <text:p>94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47" table:style-name="ce1">
            <text:p>94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48" table:style-name="ce1">
            <text:p>94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49" table:style-name="ce1">
            <text:p>94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50" table:style-name="ce1">
            <text:p>95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8" table:style-name="ce1">
            <text:p>8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51" table:style-name="ce1">
            <text:p>95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52" table:style-name="ce1">
            <text:p>95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53" table:style-name="ce1">
            <text:p>95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54" table:style-name="ce1">
            <text:p>95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55" table:style-name="ce1">
            <text:p>95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56" table:style-name="ce1">
            <text:p>95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57" table:style-name="ce1">
            <text:p>95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58" table:style-name="ce1">
            <text:p>95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59" table:style-name="ce1">
            <text:p>95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60" table:style-name="ce1">
            <text:p>96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61" table:style-name="ce1">
            <text:p>96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62" table:style-name="ce1">
            <text:p>96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63" table:style-name="ce1">
            <text:p>96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64" table:style-name="ce1">
            <text:p>96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7" table:style-name="ce1">
            <text:p>127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65" table:style-name="ce1">
            <text:p>96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66" table:style-name="ce1">
            <text:p>96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67" table:style-name="ce1">
            <text:p>96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68" table:style-name="ce1">
            <text:p>96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9" table:style-name="ce1">
            <text:p>149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69" table:style-name="ce1">
            <text:p>96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70" table:style-name="ce1">
            <text:p>97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71" table:style-name="ce1">
            <text:p>97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72" table:style-name="ce1">
            <text:p>97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73" table:style-name="ce1">
            <text:p>97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74" table:style-name="ce1">
            <text:p>97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75" table:style-name="ce1">
            <text:p>97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76" table:style-name="ce1">
            <text:p>97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77" table:style-name="ce1">
            <text:p>97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78" table:style-name="ce1">
            <text:p>97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79" table:style-name="ce1">
            <text:p>97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80" table:style-name="ce1">
            <text:p>98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81" table:style-name="ce1">
            <text:p>98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82" table:style-name="ce1">
            <text:p>98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83" table:style-name="ce1">
            <text:p>98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84" table:style-name="ce1">
            <text:p>98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85" table:style-name="ce1">
            <text:p>98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86" table:style-name="ce1">
            <text:p>98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87" table:style-name="ce1">
            <text:p>98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88" table:style-name="ce1">
            <text:p>98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89" table:style-name="ce1">
            <text:p>98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90" table:style-name="ce1">
            <text:p>99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91" table:style-name="ce1">
            <text:p>99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92" table:style-name="ce1">
            <text:p>99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93" table:style-name="ce1">
            <text:p>99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94" table:style-name="ce1">
            <text:p>99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0" table:style-name="ce1">
            <text:p>11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95" table:style-name="ce1">
            <text:p>99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96" table:style-name="ce1">
            <text:p>99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55" table:style-name="ce1">
            <text:p>15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97" table:style-name="ce1">
            <text:p>99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98" table:style-name="ce1">
            <text:p>99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99" table:style-name="ce1">
            <text:p>99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01" table:style-name="ce1">
            <text:p>100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2" table:style-name="ce1">
            <text:p>100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3" table:style-name="ce1">
            <text:p>100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04" table:style-name="ce1">
            <text:p>100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05" table:style-name="ce1">
            <text:p>100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06" table:style-name="ce1">
            <text:p>100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07" table:style-name="ce1">
            <text:p>100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8" table:style-name="ce1">
            <text:p>100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9" table:style-name="ce1">
            <text:p>100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10" table:style-name="ce1">
            <text:p>101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11" table:style-name="ce1">
            <text:p>101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12" table:style-name="ce1">
            <text:p>101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67" table:style-name="ce1">
            <text:p>67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13" table:style-name="ce1">
            <text:p>101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14" table:style-name="ce1">
            <text:p>101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51" table:style-name="ce1">
            <text:p>51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15" table:style-name="ce1">
            <text:p>101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16" table:style-name="ce1">
            <text:p>101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17" table:style-name="ce1">
            <text:p>101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18" table:style-name="ce1">
            <text:p>101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19" table:style-name="ce1">
            <text:p>101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20" table:style-name="ce1">
            <text:p>102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21" table:style-name="ce1">
            <text:p>102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22" table:style-name="ce1">
            <text:p>102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23" table:style-name="ce1">
            <text:p>102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24" table:style-name="ce1">
            <text:p>102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25" table:style-name="ce1">
            <text:p>102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26" table:style-name="ce1">
            <text:p>102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27" table:style-name="ce1">
            <text:p>102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28" table:style-name="ce1">
            <text:p>102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29" table:style-name="ce1">
            <text:p>102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0" table:style-name="ce1">
            <text:p>103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1" table:style-name="ce1">
            <text:p>103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32" table:style-name="ce1">
            <text:p>103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33" table:style-name="ce1">
            <text:p>103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34" table:style-name="ce1">
            <text:p>103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4" table:style-name="ce1">
            <text:p>94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35" table:style-name="ce1">
            <text:p>103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6" table:style-name="ce1">
            <text:p>103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7" table:style-name="ce1">
            <text:p>103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38" table:style-name="ce1">
            <text:p>103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39" table:style-name="ce1">
            <text:p>103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40" table:style-name="ce1">
            <text:p>104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9" table:style-name="ce1">
            <text:p>89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41" table:style-name="ce1">
            <text:p>104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42" table:style-name="ce1">
            <text:p>104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43" table:style-name="ce1">
            <text:p>104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44" table:style-name="ce1">
            <text:p>104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45" table:style-name="ce1">
            <text:p>104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46" table:style-name="ce1">
            <text:p>104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1" table:style-name="ce1">
            <text:p>51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47" table:style-name="ce1">
            <text:p>104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48" table:style-name="ce1">
            <text:p>104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4" table:style-name="ce1">
            <text:p>124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49" table:style-name="ce1">
            <text:p>104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50" table:style-name="ce1">
            <text:p>105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51" table:style-name="ce1">
            <text:p>105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52" table:style-name="ce1">
            <text:p>105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7" table:style-name="ce1">
            <text:p>147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53" table:style-name="ce1">
            <text:p>105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54" table:style-name="ce1">
            <text:p>105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55" table:style-name="ce1">
            <text:p>105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56" table:style-name="ce1">
            <text:p>105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57" table:style-name="ce1">
            <text:p>105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5">
          <table:table-cell office:value-type="float" office:value="1058" table:style-name="ce1">
            <text:p>105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5">
          <table:table-cell office:value-type="float" office:value="1059" table:style-name="ce1">
            <text:p>105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60" table:style-name="ce1">
            <text:p>106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61" table:style-name="ce1">
            <text:p>106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62" table:style-name="ce1">
            <text:p>106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63" table:style-name="ce1">
            <text:p>106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64" table:style-name="ce1">
            <text:p>106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65" table:style-name="ce1">
            <text:p>106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66" table:style-name="ce1">
            <text:p>106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67" table:style-name="ce1">
            <text:p>106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68" table:style-name="ce1">
            <text:p>106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69" table:style-name="ce1">
            <text:p>106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70" table:style-name="ce1">
            <text:p>107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87" table:style-name="ce1">
            <text:p>87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71" table:style-name="ce1">
            <text:p>107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72" table:style-name="ce1">
            <text:p>107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73" table:style-name="ce1">
            <text:p>107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74" table:style-name="ce1">
            <text:p>107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75" table:style-name="ce1">
            <text:p>107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76" table:style-name="ce1">
            <text:p>107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3" table:style-name="ce1">
            <text:p>123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77" table:style-name="ce1">
            <text:p>107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78" table:style-name="ce1">
            <text:p>107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79" table:style-name="ce1">
            <text:p>107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80" table:style-name="ce1">
            <text:p>108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81" table:style-name="ce1">
            <text:p>108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82" table:style-name="ce1">
            <text:p>108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83" table:style-name="ce1">
            <text:p>108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84" table:style-name="ce1">
            <text:p>108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85" table:style-name="ce1">
            <text:p>108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86" table:style-name="ce1">
            <text:p>108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87" table:style-name="ce1">
            <text:p>108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88" table:style-name="ce1">
            <text:p>108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89" table:style-name="ce1">
            <text:p>108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90" table:style-name="ce1">
            <text:p>109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91" table:style-name="ce1">
            <text:p>109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92" table:style-name="ce1">
            <text:p>109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93" table:style-name="ce1">
            <text:p>109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94" table:style-name="ce1">
            <text:p>109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95" table:style-name="ce1">
            <text:p>109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96" table:style-name="ce1">
            <text:p>109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4" table:style-name="ce1">
            <text:p>84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97" table:style-name="ce1">
            <text:p>109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98" table:style-name="ce1">
            <text:p>109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99" table:style-name="ce1">
            <text:p>109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00" table:style-name="ce1">
            <text:p>110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01" table:style-name="ce1">
            <text:p>110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02" table:style-name="ce1">
            <text:p>110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03" table:style-name="ce1">
            <text:p>110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04" table:style-name="ce1">
            <text:p>110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19" table:style-name="ce1">
            <text:p>11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05" table:style-name="ce1">
            <text:p>110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06" table:style-name="ce1">
            <text:p>110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7" table:style-name="ce1">
            <text:p>107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07" table:style-name="ce1">
            <text:p>110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08" table:style-name="ce1">
            <text:p>110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09" table:style-name="ce1">
            <text:p>110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10" table:style-name="ce1">
            <text:p>111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11" table:style-name="ce1">
            <text:p>111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12" table:style-name="ce1">
            <text:p>111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13" table:style-name="ce1">
            <text:p>111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14" table:style-name="ce1">
            <text:p>111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15" table:style-name="ce1">
            <text:p>111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16" table:style-name="ce1">
            <text:p>111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17" table:style-name="ce1">
            <text:p>111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18" table:style-name="ce1">
            <text:p>111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19" table:style-name="ce1">
            <text:p>111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20" table:style-name="ce1">
            <text:p>112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21" table:style-name="ce1">
            <text:p>112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22" table:style-name="ce1">
            <text:p>112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23" table:style-name="ce1">
            <text:p>112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24" table:style-name="ce1">
            <text:p>112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78" table:style-name="ce1">
            <text:p>78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25" table:style-name="ce1">
            <text:p>112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26" table:style-name="ce1">
            <text:p>112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71" table:style-name="ce1">
            <text:p>71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27" table:style-name="ce1">
            <text:p>112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28" table:style-name="ce1">
            <text:p>112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29" table:style-name="ce1">
            <text:p>112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30" table:style-name="ce1">
            <text:p>113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31" table:style-name="ce1">
            <text:p>113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32" table:style-name="ce1">
            <text:p>113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33" table:style-name="ce1">
            <text:p>113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34" table:style-name="ce1">
            <text:p>113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35" table:style-name="ce1">
            <text:p>113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36" table:style-name="ce1">
            <text:p>113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8" table:style-name="ce1">
            <text:p>14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37" table:style-name="ce1">
            <text:p>113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38" table:style-name="ce1">
            <text:p>113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39" table:style-name="ce1">
            <text:p>113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40" table:style-name="ce1">
            <text:p>114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41" table:style-name="ce1">
            <text:p>114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2" table:style-name="ce1">
            <text:p>114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3" table:style-name="ce1">
            <text:p>114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44" table:style-name="ce1">
            <text:p>114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45" table:style-name="ce1">
            <text:p>114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46" table:style-name="ce1">
            <text:p>114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77" table:style-name="ce1">
            <text:p>77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47" table:style-name="ce1">
            <text:p>114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8" table:style-name="ce1">
            <text:p>114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9" table:style-name="ce1">
            <text:p>114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50" table:style-name="ce1">
            <text:p>115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51" table:style-name="ce1">
            <text:p>115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52" table:style-name="ce1">
            <text:p>115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53" table:style-name="ce1">
            <text:p>115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54" table:style-name="ce1">
            <text:p>115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55" table:style-name="ce1">
            <text:p>115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56" table:style-name="ce1">
            <text:p>115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57" table:style-name="ce1">
            <text:p>115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58" table:style-name="ce1">
            <text:p>115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9" table:style-name="ce1">
            <text:p>59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59" table:style-name="ce1">
            <text:p>115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60" table:style-name="ce1">
            <text:p>116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5" table:style-name="ce1">
            <text:p>12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61" table:style-name="ce1">
            <text:p>116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62" table:style-name="ce1">
            <text:p>116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0" table:style-name="ce1">
            <text:p>11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63" table:style-name="ce1">
            <text:p>116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64" table:style-name="ce1">
            <text:p>116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8" table:style-name="ce1">
            <text:p>14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65" table:style-name="ce1">
            <text:p>116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66" table:style-name="ce1">
            <text:p>116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67" table:style-name="ce1">
            <text:p>116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68" table:style-name="ce1">
            <text:p>116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69" table:style-name="ce1">
            <text:p>116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0" table:style-name="ce1">
            <text:p>117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1" table:style-name="ce1">
            <text:p>117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72" table:style-name="ce1">
            <text:p>117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73" table:style-name="ce1">
            <text:p>117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74" table:style-name="ce1">
            <text:p>117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8" table:style-name="ce1">
            <text:p>9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75" table:style-name="ce1">
            <text:p>117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6" table:style-name="ce1">
            <text:p>117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7" table:style-name="ce1">
            <text:p>117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78" table:style-name="ce1">
            <text:p>117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79" table:style-name="ce1">
            <text:p>117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80" table:style-name="ce1">
            <text:p>118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81" table:style-name="ce1">
            <text:p>118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82" table:style-name="ce1">
            <text:p>118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9" table:style-name="ce1">
            <text:p>99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83" table:style-name="ce1">
            <text:p>118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84" table:style-name="ce1">
            <text:p>118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85" table:style-name="ce1">
            <text:p>118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86" table:style-name="ce1">
            <text:p>118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87" table:style-name="ce1">
            <text:p>118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88" table:style-name="ce1">
            <text:p>118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7" table:style-name="ce1">
            <text:p>127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89" table:style-name="ce1">
            <text:p>118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90" table:style-name="ce1">
            <text:p>119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6" table:style-name="ce1">
            <text:p>11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91" table:style-name="ce1">
            <text:p>119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92" table:style-name="ce1">
            <text:p>119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54" table:style-name="ce1">
            <text:p>154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93" table:style-name="ce1">
            <text:p>119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94" table:style-name="ce1">
            <text:p>119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95" table:style-name="ce1">
            <text:p>119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96" table:style-name="ce1">
            <text:p>119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97" table:style-name="ce1">
            <text:p>119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98" table:style-name="ce1">
            <text:p>119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99" table:style-name="ce1">
            <text:p>119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00" table:style-name="ce1">
            <text:p>120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01" table:style-name="ce1">
            <text:p>120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02" table:style-name="ce1">
            <text:p>120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8" table:style-name="ce1">
            <text:p>9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03" table:style-name="ce1">
            <text:p>120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04" table:style-name="ce1">
            <text:p>120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05" table:style-name="ce1">
            <text:p>120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06" table:style-name="ce1">
            <text:p>120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07" table:style-name="ce1">
            <text:p>120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08" table:style-name="ce1">
            <text:p>120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4" table:style-name="ce1">
            <text:p>84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09" table:style-name="ce1">
            <text:p>120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10" table:style-name="ce1">
            <text:p>121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7" table:style-name="ce1">
            <text:p>97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11" table:style-name="ce1">
            <text:p>121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12" table:style-name="ce1">
            <text:p>121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13" table:style-name="ce1">
            <text:p>121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14" table:style-name="ce1">
            <text:p>121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15" table:style-name="ce1">
            <text:p>121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16" table:style-name="ce1">
            <text:p>121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89" table:style-name="ce1">
            <text:p>8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17" table:style-name="ce1">
            <text:p>121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18" table:style-name="ce1">
            <text:p>121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19" table:style-name="ce1">
            <text:p>121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20" table:style-name="ce1">
            <text:p>122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36" table:style-name="ce1">
            <text:p>136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21" table:style-name="ce1">
            <text:p>122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22" table:style-name="ce1">
            <text:p>122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23" table:style-name="ce1">
            <text:p>122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24" table:style-name="ce1">
            <text:p>122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25" table:style-name="ce1">
            <text:p>122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26" table:style-name="ce1">
            <text:p>122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27" table:style-name="ce1">
            <text:p>122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28" table:style-name="ce1">
            <text:p>122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29" table:style-name="ce1">
            <text:p>122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30" table:style-name="ce1">
            <text:p>123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31" table:style-name="ce1">
            <text:p>123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32" table:style-name="ce1">
            <text:p>123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33" table:style-name="ce1">
            <text:p>123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34" table:style-name="ce1">
            <text:p>123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35" table:style-name="ce1">
            <text:p>123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36" table:style-name="ce1">
            <text:p>123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37" table:style-name="ce1">
            <text:p>123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38" table:style-name="ce1">
            <text:p>123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81" table:style-name="ce1">
            <text:p>81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39" table:style-name="ce1">
            <text:p>123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40" table:style-name="ce1">
            <text:p>124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41" table:style-name="ce1">
            <text:p>124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42" table:style-name="ce1">
            <text:p>124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43" table:style-name="ce1">
            <text:p>124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44" table:style-name="ce1">
            <text:p>124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45" table:style-name="ce1">
            <text:p>124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46" table:style-name="ce1">
            <text:p>124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4" table:style-name="ce1">
            <text:p>11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47" table:style-name="ce1">
            <text:p>124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48" table:style-name="ce1">
            <text:p>124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53" table:style-name="ce1">
            <text:p>153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49" table:style-name="ce1">
            <text:p>124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50" table:style-name="ce1">
            <text:p>125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51" table:style-name="ce1">
            <text:p>125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52" table:style-name="ce1">
            <text:p>125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53" table:style-name="ce1">
            <text:p>125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54" table:style-name="ce1">
            <text:p>125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7" table:style-name="ce1">
            <text:p>17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55" table:style-name="ce1">
            <text:p>125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56" table:style-name="ce1">
            <text:p>125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57" table:style-name="ce1">
            <text:p>125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58" table:style-name="ce1">
            <text:p>125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7" table:style-name="ce1">
            <text:p>87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59" table:style-name="ce1">
            <text:p>125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60" table:style-name="ce1">
            <text:p>126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61" table:style-name="ce1">
            <text:p>126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62" table:style-name="ce1">
            <text:p>126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63" table:style-name="ce1">
            <text:p>126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64" table:style-name="ce1">
            <text:p>126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65" table:style-name="ce1">
            <text:p>126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66" table:style-name="ce1">
            <text:p>126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67" table:style-name="ce1">
            <text:p>126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68" table:style-name="ce1">
            <text:p>126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69" table:style-name="ce1">
            <text:p>126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70" table:style-name="ce1">
            <text:p>127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71" table:style-name="ce1">
            <text:p>127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72" table:style-name="ce1">
            <text:p>127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73" table:style-name="ce1">
            <text:p>127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74" table:style-name="ce1">
            <text:p>127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2" table:style-name="ce1">
            <text:p>1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75" table:style-name="ce1">
            <text:p>127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76" table:style-name="ce1">
            <text:p>127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6" table:style-name="ce1">
            <text:p>146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77" table:style-name="ce1">
            <text:p>127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78" table:style-name="ce1">
            <text:p>127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79" table:style-name="ce1">
            <text:p>127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80" table:style-name="ce1">
            <text:p>128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81" table:style-name="ce1">
            <text:p>128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1282" table:style-name="ce1">
            <text:p>128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1283" table:style-name="ce1">
            <text:p>128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84" table:style-name="ce1">
            <text:p>128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85" table:style-name="ce1">
            <text:p>128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86" table:style-name="ce1">
            <text:p>128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78" table:style-name="ce1">
            <text:p>7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87" table:style-name="ce1">
            <text:p>128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88" table:style-name="ce1">
            <text:p>128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89" table:style-name="ce1">
            <text:p>128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90" table:style-name="ce1">
            <text:p>129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91" table:style-name="ce1">
            <text:p>129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92" table:style-name="ce1">
            <text:p>129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93" table:style-name="ce1">
            <text:p>129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94" table:style-name="ce1">
            <text:p>129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68" table:style-name="ce1">
            <text:p>68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95" table:style-name="ce1">
            <text:p>129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96" table:style-name="ce1">
            <text:p>129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97" table:style-name="ce1">
            <text:p>129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98" table:style-name="ce1">
            <text:p>129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99" table:style-name="ce1">
            <text:p>129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00" table:style-name="ce1">
            <text:p>130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0" table:style-name="ce1">
            <text:p>13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01" table:style-name="ce1">
            <text:p>130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2" table:style-name="ce1">
            <text:p>130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3" table:style-name="ce1">
            <text:p>130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304" table:style-name="ce1">
            <text:p>130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7" table:style-name="ce1">
            <text:p>147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305" table:style-name="ce1">
            <text:p>130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306" table:style-name="ce1">
            <text:p>130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307" table:style-name="ce1">
            <text:p>130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308" table:style-name="ce1">
            <text:p>130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309" table:style-name="ce1">
            <text:p>130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310" table:style-name="ce1">
            <text:p>131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311" table:style-name="ce1">
            <text:p>131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312" table:style-name="ce1">
            <text:p>131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313" table:style-name="ce1">
            <text:p>1313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4" table:style-name="ce1">
            <text:p>1314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5" table:style-name="ce1">
            <text:p>1315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6" table:style-name="ce1">
            <text:p>1316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7" table:style-name="ce1">
            <text:p>1317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8" table:style-name="ce1">
            <text:p>1318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08" table:style-name="ce1">
            <text:p>10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9" table:style-name="ce1">
            <text:p>1319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0" table:style-name="ce1">
            <text:p>1320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1" table:style-name="ce1">
            <text:p>1321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2" table:style-name="ce1">
            <text:p>1322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3" table:style-name="ce1">
            <text:p>1323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4" table:style-name="ce1">
            <text:p>1324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76" table:style-name="ce1">
            <text:p>7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5" table:style-name="ce1">
            <text:p>1325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6" table:style-name="ce1">
            <text:p>1326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7" table:style-name="ce1">
            <text:p>1327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8" table:style-name="ce1">
            <text:p>1328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9" table:style-name="ce1">
            <text:p>1329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0" table:style-name="ce1">
            <text:p>1330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32" table:style-name="ce1">
            <text:p>13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1" table:style-name="ce1">
            <text:p>1331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2" table:style-name="ce1">
            <text:p>1332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08" table:style-name="ce1">
            <text:p>10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3" table:style-name="ce1">
            <text:p>1333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4" table:style-name="ce1">
            <text:p>1334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5" table:style-name="ce1">
            <text:p>1335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6" table:style-name="ce1">
            <text:p>1336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7" table:style-name="ce1">
            <text:p>1337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8" table:style-name="ce1">
            <text:p>1338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9" table:style-name="ce1">
            <text:p>1339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0" table:style-name="ce1">
            <text:p>1340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1" table:style-name="ce1">
            <text:p>1341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2" table:style-name="ce1">
            <text:p>1342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3" table:style-name="ce1">
            <text:p>1343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4" table:style-name="ce1">
            <text:p>1344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5" table:style-name="ce1">
            <text:p>134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46" table:style-name="ce1">
            <text:p>134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47" table:style-name="ce1">
            <text:p>134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48" table:style-name="ce1">
            <text:p>134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89" table:style-name="ce1">
            <text:p>89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49" table:style-name="ce1">
            <text:p>134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50" table:style-name="ce1">
            <text:p>135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51" table:style-name="ce1">
            <text:p>135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52" table:style-name="ce1">
            <text:p>135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53" table:style-name="ce1">
            <text:p>135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54" table:style-name="ce1">
            <text:p>135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55" table:style-name="ce1">
            <text:p>135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356" table:style-name="ce1">
            <text:p>135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357" table:style-name="ce1">
            <text:p>135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358" table:style-name="ce1">
            <text:p>135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359" table:style-name="ce1">
            <text:p>135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360" table:style-name="ce1">
            <text:p>136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361" table:style-name="ce1">
            <text:p>136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62" table:style-name="ce1">
            <text:p>136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63" table:style-name="ce1">
            <text:p>136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64" table:style-name="ce1">
            <text:p>136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65" table:style-name="ce1">
            <text:p>136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66" table:style-name="ce1">
            <text:p>136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67" table:style-name="ce1">
            <text:p>136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368" table:style-name="ce1">
            <text:p>136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369" table:style-name="ce1">
            <text:p>136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370" table:style-name="ce1">
            <text:p>137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6" table:style-name="ce1">
            <text:p>66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371" table:style-name="ce1">
            <text:p>137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72" table:style-name="ce1">
            <text:p>137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73" table:style-name="ce1">
            <text:p>137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74" table:style-name="ce1">
            <text:p>137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75" table:style-name="ce1">
            <text:p>137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376" table:style-name="ce1">
            <text:p>137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377" table:style-name="ce1">
            <text:p>137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378" table:style-name="ce1">
            <text:p>137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379" table:style-name="ce1">
            <text:p>137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80" table:style-name="ce1">
            <text:p>138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81" table:style-name="ce1">
            <text:p>138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382" table:style-name="ce1">
            <text:p>138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383" table:style-name="ce1">
            <text:p>138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384" table:style-name="ce1">
            <text:p>138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385" table:style-name="ce1">
            <text:p>138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386" table:style-name="ce1">
            <text:p>138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387" table:style-name="ce1">
            <text:p>138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88" table:style-name="ce1">
            <text:p>138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89" table:style-name="ce1">
            <text:p>138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90" table:style-name="ce1">
            <text:p>139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102" table:style-name="ce1">
            <text:p>102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91" table:style-name="ce1">
            <text:p>139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92" table:style-name="ce1">
            <text:p>139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93" table:style-name="ce1">
            <text:p>139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94" table:style-name="ce1">
            <text:p>139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10" table:style-name="ce1">
            <text:p>11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95" table:style-name="ce1">
            <text:p>139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96" table:style-name="ce1">
            <text:p>139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97" table:style-name="ce1">
            <text:p>139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98" table:style-name="ce1">
            <text:p>139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99" table:style-name="ce1">
            <text:p>139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00" table:style-name="ce1">
            <text:p>140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01" table:style-name="ce1">
            <text:p>140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02" table:style-name="ce1">
            <text:p>140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03" table:style-name="ce1">
            <text:p>140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04" table:style-name="ce1">
            <text:p>140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05" table:style-name="ce1">
            <text:p>140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06" table:style-name="ce1">
            <text:p>140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07" table:style-name="ce1">
            <text:p>140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08" table:style-name="ce1">
            <text:p>140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09" table:style-name="ce1">
            <text:p>140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10" table:style-name="ce1">
            <text:p>141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2" table:style-name="ce1">
            <text:p>62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11" table:style-name="ce1">
            <text:p>141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12" table:style-name="ce1">
            <text:p>141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13" table:style-name="ce1">
            <text:p>141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14" table:style-name="ce1">
            <text:p>141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15" table:style-name="ce1">
            <text:p>141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16" table:style-name="ce1">
            <text:p>141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17" table:style-name="ce1">
            <text:p>141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18" table:style-name="ce1">
            <text:p>141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19" table:style-name="ce1">
            <text:p>141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20" table:style-name="ce1">
            <text:p>142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21" table:style-name="ce1">
            <text:p>142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22" table:style-name="ce1">
            <text:p>142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23" table:style-name="ce1">
            <text:p>142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24" table:style-name="ce1">
            <text:p>142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1" table:style-name="ce1">
            <text:p>41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25" table:style-name="ce1">
            <text:p>142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26" table:style-name="ce1">
            <text:p>142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27" table:style-name="ce1">
            <text:p>142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28" table:style-name="ce1">
            <text:p>142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29" table:style-name="ce1">
            <text:p>142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30" table:style-name="ce1">
            <text:p>143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31" table:style-name="ce1">
            <text:p>143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32" table:style-name="ce1">
            <text:p>143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33" table:style-name="ce1">
            <text:p>143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34" table:style-name="ce1">
            <text:p>143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35" table:style-name="ce1">
            <text:p>143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36" table:style-name="ce1">
            <text:p>143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37" table:style-name="ce1">
            <text:p>143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38" table:style-name="ce1">
            <text:p>143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39" table:style-name="ce1">
            <text:p>143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40" table:style-name="ce1">
            <text:p>144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41" table:style-name="ce1">
            <text:p>144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42" table:style-name="ce1">
            <text:p>144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2" table:style-name="ce1">
            <text:p>2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43" table:style-name="ce1">
            <text:p>144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44" table:style-name="ce1">
            <text:p>144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45" table:style-name="ce1">
            <text:p>144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46" table:style-name="ce1">
            <text:p>144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47" table:style-name="ce1">
            <text:p>144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48" table:style-name="ce1">
            <text:p>144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1" table:style-name="ce1">
            <text:p>41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49" table:style-name="ce1">
            <text:p>144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50" table:style-name="ce1">
            <text:p>145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51" table:style-name="ce1">
            <text:p>145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52" table:style-name="ce1">
            <text:p>145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53" table:style-name="ce1">
            <text:p>145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54" table:style-name="ce1">
            <text:p>145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2" table:style-name="ce1">
            <text:p>62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55" table:style-name="ce1">
            <text:p>145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56" table:style-name="ce1">
            <text:p>145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57" table:style-name="ce1">
            <text:p>145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58" table:style-name="ce1">
            <text:p>145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59" table:style-name="ce1">
            <text:p>145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60" table:style-name="ce1">
            <text:p>146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61" table:style-name="ce1">
            <text:p>146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2" table:style-name="ce1">
            <text:p>146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3" table:style-name="ce1">
            <text:p>146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64" table:style-name="ce1">
            <text:p>146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65" table:style-name="ce1">
            <text:p>146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66" table:style-name="ce1">
            <text:p>146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67" table:style-name="ce1">
            <text:p>146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8" table:style-name="ce1">
            <text:p>146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9" table:style-name="ce1">
            <text:p>146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70" table:style-name="ce1">
            <text:p>147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71" table:style-name="ce1">
            <text:p>147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72" table:style-name="ce1">
            <text:p>147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73" table:style-name="ce1">
            <text:p>147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74" table:style-name="ce1">
            <text:p>147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75" table:style-name="ce1">
            <text:p>147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76" table:style-name="ce1">
            <text:p>147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1" table:style-name="ce1">
            <text:p>1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77" table:style-name="ce1">
            <text:p>147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78" table:style-name="ce1">
            <text:p>147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79" table:style-name="ce1">
            <text:p>147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80" table:style-name="ce1">
            <text:p>148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81" table:style-name="ce1">
            <text:p>148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82" table:style-name="ce1">
            <text:p>148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83" table:style-name="ce1">
            <text:p>148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84" table:style-name="ce1">
            <text:p>148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85" table:style-name="ce1">
            <text:p>148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86" table:style-name="ce1">
            <text:p>148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9" table:style-name="ce1">
            <text:p>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87" table:style-name="ce1">
            <text:p>148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88" table:style-name="ce1">
            <text:p>148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89" table:style-name="ce1">
            <text:p>148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90" table:style-name="ce1">
            <text:p>149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91" table:style-name="ce1">
            <text:p>149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92" table:style-name="ce1">
            <text:p>149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93" table:style-name="ce1">
            <text:p>149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94" table:style-name="ce1">
            <text:p>149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95" table:style-name="ce1">
            <text:p>149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96" table:style-name="ce1">
            <text:p>149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97" table:style-name="ce1">
            <text:p>149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98" table:style-name="ce1">
            <text:p>149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99" table:style-name="ce1">
            <text:p>149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00" table:style-name="ce1">
            <text:p>150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01" table:style-name="ce1">
            <text:p>150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02" table:style-name="ce1">
            <text:p>150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03" table:style-name="ce1">
            <text:p>150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04" table:style-name="ce1">
            <text:p>150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05" table:style-name="ce1">
            <text:p>150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06" table:style-name="ce1">
            <text:p>150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07" table:style-name="ce1">
            <text:p>150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08" table:style-name="ce1">
            <text:p>150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09" table:style-name="ce1">
            <text:p>150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10" table:style-name="ce1">
            <text:p>151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11" table:style-name="ce1">
            <text:p>151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12" table:style-name="ce1">
            <text:p>151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13" table:style-name="ce1">
            <text:p>151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14" table:style-name="ce1">
            <text:p>151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15" table:style-name="ce1">
            <text:p>151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16" table:style-name="ce1">
            <text:p>151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17" table:style-name="ce1">
            <text:p>151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18" table:style-name="ce1">
            <text:p>151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19" table:style-name="ce1">
            <text:p>151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20" table:style-name="ce1">
            <text:p>152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21" table:style-name="ce1">
            <text:p>152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22" table:style-name="ce1">
            <text:p>152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23" table:style-name="ce1">
            <text:p>152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24" table:style-name="ce1">
            <text:p>152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25" table:style-name="ce1">
            <text:p>152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6" table:style-name="ce1">
            <text:p>152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7" table:style-name="ce1">
            <text:p>152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28" table:style-name="ce1">
            <text:p>152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29" table:style-name="ce1">
            <text:p>152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0" table:style-name="ce1">
            <text:p>153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6" table:style-name="ce1">
            <text:p>6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1" table:style-name="ce1">
            <text:p>153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32" table:style-name="ce1">
            <text:p>153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33" table:style-name="ce1">
            <text:p>153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34" table:style-name="ce1">
            <text:p>153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35" table:style-name="ce1">
            <text:p>153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36" table:style-name="ce1">
            <text:p>153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37" table:style-name="ce1">
            <text:p>153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8" table:style-name="ce1">
            <text:p>153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9" table:style-name="ce1">
            <text:p>153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0" table:style-name="ce1">
            <text:p>154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1" table:style-name="ce1">
            <text:p>154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42" table:style-name="ce1">
            <text:p>154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7" table:style-name="ce1">
            <text:p>6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43" table:style-name="ce1">
            <text:p>154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44" table:style-name="ce1">
            <text:p>154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45" table:style-name="ce1">
            <text:p>154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46" table:style-name="ce1">
            <text:p>154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47" table:style-name="ce1">
            <text:p>154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8" table:style-name="ce1">
            <text:p>154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9" table:style-name="ce1">
            <text:p>154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0" table:style-name="ce1">
            <text:p>155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1" table:style-name="ce1">
            <text:p>155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52" table:style-name="ce1">
            <text:p>155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53" table:style-name="ce1">
            <text:p>155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54" table:style-name="ce1">
            <text:p>155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55" table:style-name="ce1">
            <text:p>155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6" table:style-name="ce1">
            <text:p>155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7" table:style-name="ce1">
            <text:p>155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58" table:style-name="ce1">
            <text:p>155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59" table:style-name="ce1">
            <text:p>155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60" table:style-name="ce1">
            <text:p>156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61" table:style-name="ce1">
            <text:p>156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62" table:style-name="ce1">
            <text:p>156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63" table:style-name="ce1">
            <text:p>156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64" table:style-name="ce1">
            <text:p>156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65" table:style-name="ce1">
            <text:p>156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66" table:style-name="ce1">
            <text:p>156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67" table:style-name="ce1">
            <text:p>156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68" table:style-name="ce1">
            <text:p>156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69" table:style-name="ce1">
            <text:p>156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70" table:style-name="ce1">
            <text:p>157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71" table:style-name="ce1">
            <text:p>157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72" table:style-name="ce1">
            <text:p>157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73" table:style-name="ce1">
            <text:p>157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74" table:style-name="ce1">
            <text:p>157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" table:style-name="ce1">
            <text:p>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75" table:style-name="ce1">
            <text:p>157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76" table:style-name="ce1">
            <text:p>157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1" table:style-name="ce1">
            <text:p>11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77" table:style-name="ce1">
            <text:p>157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78" table:style-name="ce1">
            <text:p>157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79" table:style-name="ce1">
            <text:p>157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80" table:style-name="ce1">
            <text:p>158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81" table:style-name="ce1">
            <text:p>158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82" table:style-name="ce1">
            <text:p>158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83" table:style-name="ce1">
            <text:p>158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84" table:style-name="ce1">
            <text:p>158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85" table:style-name="ce1">
            <text:p>158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86" table:style-name="ce1">
            <text:p>158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9" table:style-name="ce1">
            <text:p>59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87" table:style-name="ce1">
            <text:p>158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88" table:style-name="ce1">
            <text:p>158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89" table:style-name="ce1">
            <text:p>158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90" table:style-name="ce1">
            <text:p>159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91" table:style-name="ce1">
            <text:p>159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92" table:style-name="ce1">
            <text:p>159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93" table:style-name="ce1">
            <text:p>159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94" table:style-name="ce1">
            <text:p>159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95" table:style-name="ce1">
            <text:p>159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96" table:style-name="ce1">
            <text:p>159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97" table:style-name="ce1">
            <text:p>159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98" table:style-name="ce1">
            <text:p>159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99" table:style-name="ce1">
            <text:p>159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00" table:style-name="ce1">
            <text:p>160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01" table:style-name="ce1">
            <text:p>160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02" table:style-name="ce1">
            <text:p>160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03" table:style-name="ce1">
            <text:p>160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04" table:style-name="ce1">
            <text:p>160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05" table:style-name="ce1">
            <text:p>160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06" table:style-name="ce1">
            <text:p>160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07" table:style-name="ce1">
            <text:p>160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08" table:style-name="ce1">
            <text:p>160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09" table:style-name="ce1">
            <text:p>160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10" table:style-name="ce1">
            <text:p>161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11" table:style-name="ce1">
            <text:p>161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12" table:style-name="ce1">
            <text:p>161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87" table:style-name="ce1">
            <text:p>8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13" table:style-name="ce1">
            <text:p>161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14" table:style-name="ce1">
            <text:p>161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15" table:style-name="ce1">
            <text:p>161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16" table:style-name="ce1">
            <text:p>161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17" table:style-name="ce1">
            <text:p>161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18" table:style-name="ce1">
            <text:p>161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19" table:style-name="ce1">
            <text:p>161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20" table:style-name="ce1">
            <text:p>162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21" table:style-name="ce1">
            <text:p>162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22" table:style-name="ce1">
            <text:p>162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23" table:style-name="ce1">
            <text:p>162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24" table:style-name="ce1">
            <text:p>162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25" table:style-name="ce1">
            <text:p>162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26" table:style-name="ce1">
            <text:p>162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27" table:style-name="ce1">
            <text:p>162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28" table:style-name="ce1">
            <text:p>162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29" table:style-name="ce1">
            <text:p>162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30" table:style-name="ce1">
            <text:p>163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31" table:style-name="ce1">
            <text:p>163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32" table:style-name="ce1">
            <text:p>163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33" table:style-name="ce1">
            <text:p>163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34" table:style-name="ce1">
            <text:p>163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6" table:style-name="ce1">
            <text:p>66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35" table:style-name="ce1">
            <text:p>163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36" table:style-name="ce1">
            <text:p>163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37" table:style-name="ce1">
            <text:p>163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38" table:style-name="ce1">
            <text:p>163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39" table:style-name="ce1">
            <text:p>163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40" table:style-name="ce1">
            <text:p>164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41" table:style-name="ce1">
            <text:p>164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42" table:style-name="ce1">
            <text:p>164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43" table:style-name="ce1">
            <text:p>164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44" table:style-name="ce1">
            <text:p>164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45" table:style-name="ce1">
            <text:p>164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46" table:style-name="ce1">
            <text:p>164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47" table:style-name="ce1">
            <text:p>164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48" table:style-name="ce1">
            <text:p>164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49" table:style-name="ce1">
            <text:p>164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50" table:style-name="ce1">
            <text:p>165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51" table:style-name="ce1">
            <text:p>165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52" table:style-name="ce1">
            <text:p>165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53" table:style-name="ce1">
            <text:p>165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54" table:style-name="ce1">
            <text:p>165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55" table:style-name="ce1">
            <text:p>165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56" table:style-name="ce1">
            <text:p>165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57" table:style-name="ce1">
            <text:p>165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58" table:style-name="ce1">
            <text:p>165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59" table:style-name="ce1">
            <text:p>165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60" table:style-name="ce1">
            <text:p>166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61" table:style-name="ce1">
            <text:p>166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62" table:style-name="ce1">
            <text:p>166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7" table:style-name="ce1">
            <text:p>7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63" table:style-name="ce1">
            <text:p>166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64" table:style-name="ce1">
            <text:p>166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65" table:style-name="ce1">
            <text:p>166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66" table:style-name="ce1">
            <text:p>166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67" table:style-name="ce1">
            <text:p>166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68" table:style-name="ce1">
            <text:p>166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69" table:style-name="ce1">
            <text:p>166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70" table:style-name="ce1">
            <text:p>167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71" table:style-name="ce1">
            <text:p>167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72" table:style-name="ce1">
            <text:p>167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73" table:style-name="ce1">
            <text:p>167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74" table:style-name="ce1">
            <text:p>167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75" table:style-name="ce1">
            <text:p>167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76" table:style-name="ce1">
            <text:p>167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77" table:style-name="ce1">
            <text:p>167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78" table:style-name="ce1">
            <text:p>167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79" table:style-name="ce1">
            <text:p>167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0" table:style-name="ce1">
            <text:p>168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1" table:style-name="ce1">
            <text:p>168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2" table:style-name="ce1">
            <text:p>168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3" table:style-name="ce1">
            <text:p>168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84" table:style-name="ce1">
            <text:p>168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85" table:style-name="ce1">
            <text:p>168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86" table:style-name="ce1">
            <text:p>168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87" table:style-name="ce1">
            <text:p>168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8" table:style-name="ce1">
            <text:p>168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9" table:style-name="ce1">
            <text:p>168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90" table:style-name="ce1">
            <text:p>169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91" table:style-name="ce1">
            <text:p>169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92" table:style-name="ce1">
            <text:p>169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93" table:style-name="ce1">
            <text:p>169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94" table:style-name="ce1">
            <text:p>169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95" table:style-name="ce1">
            <text:p>169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96" table:style-name="ce1">
            <text:p>169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97" table:style-name="ce1">
            <text:p>169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98" table:style-name="ce1">
            <text:p>169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99" table:style-name="ce1">
            <text:p>169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00" table:style-name="ce1">
            <text:p>170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63" table:style-name="ce1">
            <text:p>63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01" table:style-name="ce1">
            <text:p>170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02" table:style-name="ce1">
            <text:p>170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1" table:style-name="ce1">
            <text:p>71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03" table:style-name="ce1">
            <text:p>170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04" table:style-name="ce1">
            <text:p>170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1" table:style-name="ce1">
            <text:p>11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05" table:style-name="ce1">
            <text:p>170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06" table:style-name="ce1">
            <text:p>170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9" table:style-name="ce1">
            <text:p>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07" table:style-name="ce1">
            <text:p>170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08" table:style-name="ce1">
            <text:p>170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09" table:style-name="ce1">
            <text:p>170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10" table:style-name="ce1">
            <text:p>171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11" table:style-name="ce1">
            <text:p>171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12" table:style-name="ce1">
            <text:p>171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13" table:style-name="ce1">
            <text:p>171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14" table:style-name="ce1">
            <text:p>171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15" table:style-name="ce1">
            <text:p>171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16" table:style-name="ce1">
            <text:p>171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17" table:style-name="ce1">
            <text:p>171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18" table:style-name="ce1">
            <text:p>171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19" table:style-name="ce1">
            <text:p>171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20" table:style-name="ce1">
            <text:p>172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21" table:style-name="ce1">
            <text:p>172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22" table:style-name="ce1">
            <text:p>172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23" table:style-name="ce1">
            <text:p>172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24" table:style-name="ce1">
            <text:p>172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25" table:style-name="ce1">
            <text:p>172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26" table:style-name="ce1">
            <text:p>172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27" table:style-name="ce1">
            <text:p>172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28" table:style-name="ce1">
            <text:p>172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29" table:style-name="ce1">
            <text:p>172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30" table:style-name="ce1">
            <text:p>173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31" table:style-name="ce1">
            <text:p>173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32" table:style-name="ce1">
            <text:p>173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33" table:style-name="ce1">
            <text:p>173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34" table:style-name="ce1">
            <text:p>173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35" table:style-name="ce1">
            <text:p>173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36" table:style-name="ce1">
            <text:p>173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37" table:style-name="ce1">
            <text:p>173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38" table:style-name="ce1">
            <text:p>173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39" table:style-name="ce1">
            <text:p>173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40" table:style-name="ce1">
            <text:p>174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41" table:style-name="ce1">
            <text:p>174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42" table:style-name="ce1">
            <text:p>174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43" table:style-name="ce1">
            <text:p>174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44" table:style-name="ce1">
            <text:p>174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45" table:style-name="ce1">
            <text:p>174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46" table:style-name="ce1">
            <text:p>174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47" table:style-name="ce1">
            <text:p>174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48" table:style-name="ce1">
            <text:p>174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5" table:style-name="ce1">
            <text:p>5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49" table:style-name="ce1">
            <text:p>174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0" table:style-name="ce1">
            <text:p>175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4" table:style-name="ce1">
            <text:p>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1" table:style-name="ce1">
            <text:p>175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52" table:style-name="ce1">
            <text:p>175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53" table:style-name="ce1">
            <text:p>175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54" table:style-name="ce1">
            <text:p>175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55" table:style-name="ce1">
            <text:p>175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56" table:style-name="ce1">
            <text:p>175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1" table:style-name="ce1">
            <text:p>41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57" table:style-name="ce1">
            <text:p>175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8" table:style-name="ce1">
            <text:p>175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9" table:style-name="ce1">
            <text:p>175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0" table:style-name="ce1">
            <text:p>176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1" table:style-name="ce1">
            <text:p>176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62" table:style-name="ce1">
            <text:p>176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2" table:style-name="ce1">
            <text:p>62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63" table:style-name="ce1">
            <text:p>176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64" table:style-name="ce1">
            <text:p>176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65" table:style-name="ce1">
            <text:p>176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66" table:style-name="ce1">
            <text:p>176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67" table:style-name="ce1">
            <text:p>176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8" table:style-name="ce1">
            <text:p>176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9" table:style-name="ce1">
            <text:p>176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0" table:style-name="ce1">
            <text:p>177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1" table:style-name="ce1">
            <text:p>177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72" table:style-name="ce1">
            <text:p>177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73" table:style-name="ce1">
            <text:p>177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74" table:style-name="ce1">
            <text:p>177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75" table:style-name="ce1">
            <text:p>177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6" table:style-name="ce1">
            <text:p>177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7" table:style-name="ce1">
            <text:p>177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78" table:style-name="ce1">
            <text:p>177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79" table:style-name="ce1">
            <text:p>177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80" table:style-name="ce1">
            <text:p>178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81" table:style-name="ce1">
            <text:p>178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82" table:style-name="ce1">
            <text:p>178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83" table:style-name="ce1">
            <text:p>178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84" table:style-name="ce1">
            <text:p>178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85" table:style-name="ce1">
            <text:p>178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86" table:style-name="ce1">
            <text:p>178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87" table:style-name="ce1">
            <text:p>178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88" table:style-name="ce1">
            <text:p>178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89" table:style-name="ce1">
            <text:p>178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90" table:style-name="ce1">
            <text:p>179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91" table:style-name="ce1">
            <text:p>179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92" table:style-name="ce1">
            <text:p>179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93" table:style-name="ce1">
            <text:p>179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94" table:style-name="ce1">
            <text:p>179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1" table:style-name="ce1">
            <text:p>1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95" table:style-name="ce1">
            <text:p>179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96" table:style-name="ce1">
            <text:p>179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97" table:style-name="ce1">
            <text:p>179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98" table:style-name="ce1">
            <text:p>179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99" table:style-name="ce1">
            <text:p>179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00" table:style-name="ce1">
            <text:p>180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01" table:style-name="ce1">
            <text:p>180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02" table:style-name="ce1">
            <text:p>180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03" table:style-name="ce1">
            <text:p>180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04" table:style-name="ce1">
            <text:p>180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05" table:style-name="ce1">
            <text:p>180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06" table:style-name="ce1">
            <text:p>180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7" table:style-name="ce1">
            <text:p>6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07" table:style-name="ce1">
            <text:p>180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08" table:style-name="ce1">
            <text:p>180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09" table:style-name="ce1">
            <text:p>180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10" table:style-name="ce1">
            <text:p>181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11" table:style-name="ce1">
            <text:p>181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12" table:style-name="ce1">
            <text:p>181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13" table:style-name="ce1">
            <text:p>181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14" table:style-name="ce1">
            <text:p>181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15" table:style-name="ce1">
            <text:p>181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16" table:style-name="ce1">
            <text:p>181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17" table:style-name="ce1">
            <text:p>181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18" table:style-name="ce1">
            <text:p>181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19" table:style-name="ce1">
            <text:p>181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20" table:style-name="ce1">
            <text:p>182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21" table:style-name="ce1">
            <text:p>182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22" table:style-name="ce1">
            <text:p>182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23" table:style-name="ce1">
            <text:p>182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24" table:style-name="ce1">
            <text:p>182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25" table:style-name="ce1">
            <text:p>182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26" table:style-name="ce1">
            <text:p>182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27" table:style-name="ce1">
            <text:p>182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28" table:style-name="ce1">
            <text:p>182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29" table:style-name="ce1">
            <text:p>182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30" table:style-name="ce1">
            <text:p>183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97" table:style-name="ce1">
            <text:p>97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31" table:style-name="ce1">
            <text:p>183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32" table:style-name="ce1">
            <text:p>183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33" table:style-name="ce1">
            <text:p>183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34" table:style-name="ce1">
            <text:p>183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1" table:style-name="ce1">
            <text:p>121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35" table:style-name="ce1">
            <text:p>183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36" table:style-name="ce1">
            <text:p>183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37" table:style-name="ce1">
            <text:p>183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38" table:style-name="ce1">
            <text:p>183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39" table:style-name="ce1">
            <text:p>183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40" table:style-name="ce1">
            <text:p>184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41" table:style-name="ce1">
            <text:p>184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42" table:style-name="ce1">
            <text:p>184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43" table:style-name="ce1">
            <text:p>184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44" table:style-name="ce1">
            <text:p>184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45" table:style-name="ce1">
            <text:p>184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46" table:style-name="ce1">
            <text:p>184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47" table:style-name="ce1">
            <text:p>184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48" table:style-name="ce1">
            <text:p>184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49" table:style-name="ce1">
            <text:p>184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50" table:style-name="ce1">
            <text:p>185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2" table:style-name="ce1">
            <text:p>62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51" table:style-name="ce1">
            <text:p>185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52" table:style-name="ce1">
            <text:p>185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53" table:style-name="ce1">
            <text:p>185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54" table:style-name="ce1">
            <text:p>185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55" table:style-name="ce1">
            <text:p>185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56" table:style-name="ce1">
            <text:p>185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57" table:style-name="ce1">
            <text:p>185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58" table:style-name="ce1">
            <text:p>185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59" table:style-name="ce1">
            <text:p>185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60" table:style-name="ce1">
            <text:p>186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61" table:style-name="ce1">
            <text:p>186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62" table:style-name="ce1">
            <text:p>186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63" table:style-name="ce1">
            <text:p>186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64" table:style-name="ce1">
            <text:p>186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1" table:style-name="ce1">
            <text:p>41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65" table:style-name="ce1">
            <text:p>186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66" table:style-name="ce1">
            <text:p>186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67" table:style-name="ce1">
            <text:p>186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68" table:style-name="ce1">
            <text:p>186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69" table:style-name="ce1">
            <text:p>186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70" table:style-name="ce1">
            <text:p>187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71" table:style-name="ce1">
            <text:p>187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72" table:style-name="ce1">
            <text:p>187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73" table:style-name="ce1">
            <text:p>187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74" table:style-name="ce1">
            <text:p>187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97" table:style-name="ce1">
            <text:p>97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75" table:style-name="ce1">
            <text:p>187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76" table:style-name="ce1">
            <text:p>187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77" table:style-name="ce1">
            <text:p>187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78" table:style-name="ce1">
            <text:p>187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12" table:style-name="ce1">
            <text:p>112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79" table:style-name="ce1">
            <text:p>187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80" table:style-name="ce1">
            <text:p>188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81" table:style-name="ce1">
            <text:p>188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82" table:style-name="ce1">
            <text:p>188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83" table:style-name="ce1">
            <text:p>188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84" table:style-name="ce1">
            <text:p>188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85" table:style-name="ce1">
            <text:p>188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86" table:style-name="ce1">
            <text:p>188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87" table:style-name="ce1">
            <text:p>188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88" table:style-name="ce1">
            <text:p>188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89" table:style-name="ce1">
            <text:p>188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90" table:style-name="ce1">
            <text:p>189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91" table:style-name="ce1">
            <text:p>189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92" table:style-name="ce1">
            <text:p>189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93" table:style-name="ce1">
            <text:p>189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94" table:style-name="ce1">
            <text:p>189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95" table:style-name="ce1">
            <text:p>189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96" table:style-name="ce1">
            <text:p>189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97" table:style-name="ce1">
            <text:p>189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98" table:style-name="ce1">
            <text:p>189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99" table:style-name="ce1">
            <text:p>189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00" table:style-name="ce1">
            <text:p>190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01" table:style-name="ce1">
            <text:p>190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2" table:style-name="ce1">
            <text:p>190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3" table:style-name="ce1">
            <text:p>190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04" table:style-name="ce1">
            <text:p>190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05" table:style-name="ce1">
            <text:p>190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06" table:style-name="ce1">
            <text:p>190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07" table:style-name="ce1">
            <text:p>190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8" table:style-name="ce1">
            <text:p>190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9" table:style-name="ce1">
            <text:p>190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10" table:style-name="ce1">
            <text:p>191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11" table:style-name="ce1">
            <text:p>191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12" table:style-name="ce1">
            <text:p>191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13" table:style-name="ce1">
            <text:p>191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14" table:style-name="ce1">
            <text:p>191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15" table:style-name="ce1">
            <text:p>191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16" table:style-name="ce1">
            <text:p>191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17" table:style-name="ce1">
            <text:p>191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18" table:style-name="ce1">
            <text:p>191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19" table:style-name="ce1">
            <text:p>191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20" table:style-name="ce1">
            <text:p>192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21" table:style-name="ce1">
            <text:p>192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22" table:style-name="ce1">
            <text:p>192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63" table:style-name="ce1">
            <text:p>63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23" table:style-name="ce1">
            <text:p>192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24" table:style-name="ce1">
            <text:p>192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3" table:style-name="ce1">
            <text:p>3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25" table:style-name="ce1">
            <text:p>192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26" table:style-name="ce1">
            <text:p>192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" table:style-name="ce1">
            <text:p>5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27" table:style-name="ce1">
            <text:p>192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28" table:style-name="ce1">
            <text:p>192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29" table:style-name="ce1">
            <text:p>192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30" table:style-name="ce1">
            <text:p>193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31" table:style-name="ce1">
            <text:p>193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32" table:style-name="ce1">
            <text:p>193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33" table:style-name="ce1">
            <text:p>193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34" table:style-name="ce1">
            <text:p>193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35" table:style-name="ce1">
            <text:p>193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36" table:style-name="ce1">
            <text:p>193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37" table:style-name="ce1">
            <text:p>193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38" table:style-name="ce1">
            <text:p>193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39" table:style-name="ce1">
            <text:p>193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40" table:style-name="ce1">
            <text:p>194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41" table:style-name="ce1">
            <text:p>194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42" table:style-name="ce1">
            <text:p>194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43" table:style-name="ce1">
            <text:p>194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44" table:style-name="ce1">
            <text:p>194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45" table:style-name="ce1">
            <text:p>194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46" table:style-name="ce1">
            <text:p>194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47" table:style-name="ce1">
            <text:p>194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48" table:style-name="ce1">
            <text:p>194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49" table:style-name="ce1">
            <text:p>194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50" table:style-name="ce1">
            <text:p>195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51" table:style-name="ce1">
            <text:p>195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52" table:style-name="ce1">
            <text:p>195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53" table:style-name="ce1">
            <text:p>195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54" table:style-name="ce1">
            <text:p>195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55" table:style-name="ce1">
            <text:p>195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56" table:style-name="ce1">
            <text:p>195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57" table:style-name="ce1">
            <text:p>195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58" table:style-name="ce1">
            <text:p>195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59" table:style-name="ce1">
            <text:p>195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60" table:style-name="ce1">
            <text:p>196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61" table:style-name="ce1">
            <text:p>196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62" table:style-name="ce1">
            <text:p>196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63" table:style-name="ce1">
            <text:p>196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64" table:style-name="ce1">
            <text:p>196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65" table:style-name="ce1">
            <text:p>196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66" table:style-name="ce1">
            <text:p>196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1" table:style-name="ce1">
            <text:p>71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67" table:style-name="ce1">
            <text:p>196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68" table:style-name="ce1">
            <text:p>196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69" table:style-name="ce1">
            <text:p>196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0" table:style-name="ce1">
            <text:p>197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1" table:style-name="ce1">
            <text:p>197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72" table:style-name="ce1">
            <text:p>197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73" table:style-name="ce1">
            <text:p>197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74" table:style-name="ce1">
            <text:p>197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75" table:style-name="ce1">
            <text:p>197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76" table:style-name="ce1">
            <text:p>197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77" table:style-name="ce1">
            <text:p>197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8" table:style-name="ce1">
            <text:p>197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9" table:style-name="ce1">
            <text:p>197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0" table:style-name="ce1">
            <text:p>198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1" table:style-name="ce1">
            <text:p>198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82" table:style-name="ce1">
            <text:p>198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7" table:style-name="ce1">
            <text:p>6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83" table:style-name="ce1">
            <text:p>198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84" table:style-name="ce1">
            <text:p>198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85" table:style-name="ce1">
            <text:p>198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86" table:style-name="ce1">
            <text:p>198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87" table:style-name="ce1">
            <text:p>198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8" table:style-name="ce1">
            <text:p>198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9" table:style-name="ce1">
            <text:p>198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0" table:style-name="ce1">
            <text:p>199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1" table:style-name="ce1">
            <text:p>199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92" table:style-name="ce1">
            <text:p>199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93" table:style-name="ce1">
            <text:p>199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94" table:style-name="ce1">
            <text:p>199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95" table:style-name="ce1">
            <text:p>199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6" table:style-name="ce1">
            <text:p>199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7" table:style-name="ce1">
            <text:p>199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98" table:style-name="ce1">
            <text:p>199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99" table:style-name="ce1">
            <text:p>199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00" table:style-name="ce1">
            <text:p>200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01" table:style-name="ce1">
            <text:p>200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02" table:style-name="ce1">
            <text:p>200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03" table:style-name="ce1">
            <text:p>200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04" table:style-name="ce1">
            <text:p>200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05" table:style-name="ce1">
            <text:p>200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06" table:style-name="ce1">
            <text:p>200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07" table:style-name="ce1">
            <text:p>200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08" table:style-name="ce1">
            <text:p>200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09" table:style-name="ce1">
            <text:p>200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010" table:style-name="ce1">
            <text:p>201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011" table:style-name="ce1">
            <text:p>201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2012" table:style-name="ce1">
            <text:p>201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" table:style-name="ce1">
            <text:p>2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2013" table:style-name="ce1">
            <text:p>201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14" table:style-name="ce1">
            <text:p>201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" table:style-name="ce1">
            <text:p>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15" table:style-name="ce1">
            <text:p>201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2016" table:style-name="ce1">
            <text:p>201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" table:style-name="ce1">
            <text:p>7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2017" table:style-name="ce1">
            <text:p>201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2018" table:style-name="ce1">
            <text:p>201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2019" table:style-name="ce1">
            <text:p>201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2020" table:style-name="ce1">
            <text:p>202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2021" table:style-name="ce1">
            <text:p>202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23" table:style-name="ce1">
            <text:p>202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4" table:style-name="ce1">
            <text:p>202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26" table:style-name="ce1">
            <text:p>202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9" table:style-name="ce1">
            <text:p>59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27" table:style-name="ce1">
            <text:p>202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2028" table:style-name="ce1">
            <text:p>202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2029" table:style-name="ce1">
            <text:p>202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2030" table:style-name="ce1">
            <text:p>203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2031" table:style-name="ce1">
            <text:p>203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2" table:style-name="ce1">
            <text:p>203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3" table:style-name="ce1">
            <text:p>203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34" table:style-name="ce1">
            <text:p>203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35" table:style-name="ce1">
            <text:p>203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2036" table:style-name="ce1">
            <text:p>203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3" table:style-name="ce1">
            <text:p>13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2037" table:style-name="ce1">
            <text:p>203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2038" table:style-name="ce1">
            <text:p>203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2039" table:style-name="ce1">
            <text:p>203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40" table:style-name="ce1">
            <text:p>204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41" table:style-name="ce1">
            <text:p>204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2042" table:style-name="ce1">
            <text:p>204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2043" table:style-name="ce1">
            <text:p>204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4" table:style-name="ce1">
            <text:p>204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5" table:style-name="ce1">
            <text:p>204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46" table:style-name="ce1">
            <text:p>204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47" table:style-name="ce1">
            <text:p>204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48" table:style-name="ce1">
            <text:p>204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49" table:style-name="ce1">
            <text:p>204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50" table:style-name="ce1">
            <text:p>205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51" table:style-name="ce1">
            <text:p>205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2" table:style-name="ce1">
            <text:p>205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3" table:style-name="ce1">
            <text:p>205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54" table:style-name="ce1">
            <text:p>205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55" table:style-name="ce1">
            <text:p>205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56" table:style-name="ce1">
            <text:p>205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57" table:style-name="ce1">
            <text:p>205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8" table:style-name="ce1">
            <text:p>205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9" table:style-name="ce1">
            <text:p>205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60" table:style-name="ce1">
            <text:p>206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61" table:style-name="ce1">
            <text:p>206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2" table:style-name="ce1">
            <text:p>206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3" table:style-name="ce1">
            <text:p>206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64" table:style-name="ce1">
            <text:p>206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65" table:style-name="ce1">
            <text:p>206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6" table:style-name="ce1">
            <text:p>206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7" table:style-name="ce1">
            <text:p>206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68" table:style-name="ce1">
            <text:p>206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69" table:style-name="ce1">
            <text:p>206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70" table:style-name="ce1">
            <text:p>207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71" table:style-name="ce1">
            <text:p>207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2" table:style-name="ce1">
            <text:p>207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3" table:style-name="ce1">
            <text:p>207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74" table:style-name="ce1">
            <text:p>207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75" table:style-name="ce1">
            <text:p>207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6" table:style-name="ce1">
            <text:p>207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7" table:style-name="ce1">
            <text:p>207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78" table:style-name="ce1">
            <text:p>207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79" table:style-name="ce1">
            <text:p>207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0" table:style-name="ce1">
            <text:p>208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1" table:style-name="ce1">
            <text:p>208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82" table:style-name="ce1">
            <text:p>208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83" table:style-name="ce1">
            <text:p>208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84" table:style-name="ce1">
            <text:p>208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85" table:style-name="ce1">
            <text:p>208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6" table:style-name="ce1">
            <text:p>208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7" table:style-name="ce1">
            <text:p>208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88" table:style-name="ce1">
            <text:p>208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89" table:style-name="ce1">
            <text:p>208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0" table:style-name="ce1">
            <text:p>209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1" table:style-name="ce1">
            <text:p>209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92" table:style-name="ce1">
            <text:p>209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93" table:style-name="ce1">
            <text:p>209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4" table:style-name="ce1">
            <text:p>209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5" table:style-name="ce1">
            <text:p>209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96" table:style-name="ce1">
            <text:p>209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97" table:style-name="ce1">
            <text:p>209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98" table:style-name="ce1">
            <text:p>209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99" table:style-name="ce1">
            <text:p>209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0" table:style-name="ce1">
            <text:p>210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1" table:style-name="ce1">
            <text:p>210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02" table:style-name="ce1">
            <text:p>210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03" table:style-name="ce1">
            <text:p>210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4" table:style-name="ce1">
            <text:p>210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5" table:style-name="ce1">
            <text:p>210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06" table:style-name="ce1">
            <text:p>210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07" table:style-name="ce1">
            <text:p>210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8" table:style-name="ce1">
            <text:p>210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9" table:style-name="ce1">
            <text:p>210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10" table:style-name="ce1">
            <text:p>211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11" table:style-name="ce1">
            <text:p>211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12" table:style-name="ce1">
            <text:p>211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13" table:style-name="ce1">
            <text:p>211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4" table:style-name="ce1">
            <text:p>211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5" table:style-name="ce1">
            <text:p>211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16" table:style-name="ce1">
            <text:p>211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17" table:style-name="ce1">
            <text:p>211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8" table:style-name="ce1">
            <text:p>211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9" table:style-name="ce1">
            <text:p>211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0" table:style-name="ce1">
            <text:p>212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1" table:style-name="ce1">
            <text:p>212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2" table:style-name="ce1">
            <text:p>212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3" table:style-name="ce1">
            <text:p>212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24" table:style-name="ce1">
            <text:p>212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25" table:style-name="ce1">
            <text:p>212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26" table:style-name="ce1">
            <text:p>212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27" table:style-name="ce1">
            <text:p>212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8" table:style-name="ce1">
            <text:p>212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9" table:style-name="ce1">
            <text:p>212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30" table:style-name="ce1">
            <text:p>213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31" table:style-name="ce1">
            <text:p>213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2" table:style-name="ce1">
            <text:p>213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3" table:style-name="ce1">
            <text:p>213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34" table:style-name="ce1">
            <text:p>213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35" table:style-name="ce1">
            <text:p>213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6" table:style-name="ce1">
            <text:p>213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7" table:style-name="ce1">
            <text:p>213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38" table:style-name="ce1">
            <text:p>213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39" table:style-name="ce1">
            <text:p>213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40" table:style-name="ce1">
            <text:p>214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41" table:style-name="ce1">
            <text:p>214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2" table:style-name="ce1">
            <text:p>214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3" table:style-name="ce1">
            <text:p>214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44" table:style-name="ce1">
            <text:p>214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45" table:style-name="ce1">
            <text:p>214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6" table:style-name="ce1">
            <text:p>214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7" table:style-name="ce1">
            <text:p>214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48" table:style-name="ce1">
            <text:p>214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49" table:style-name="ce1">
            <text:p>214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0" table:style-name="ce1">
            <text:p>215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1" table:style-name="ce1">
            <text:p>215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52" table:style-name="ce1">
            <text:p>215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53" table:style-name="ce1">
            <text:p>215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54" table:style-name="ce1">
            <text:p>215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55" table:style-name="ce1">
            <text:p>215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6" table:style-name="ce1">
            <text:p>215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7" table:style-name="ce1">
            <text:p>215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58" table:style-name="ce1">
            <text:p>215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59" table:style-name="ce1">
            <text:p>215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0" table:style-name="ce1">
            <text:p>216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1" table:style-name="ce1">
            <text:p>216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62" table:style-name="ce1">
            <text:p>216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63" table:style-name="ce1">
            <text:p>216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4" table:style-name="ce1">
            <text:p>216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5" table:style-name="ce1">
            <text:p>216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66" table:style-name="ce1">
            <text:p>216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67" table:style-name="ce1">
            <text:p>216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68" table:style-name="ce1">
            <text:p>216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69" table:style-name="ce1">
            <text:p>216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0" table:style-name="ce1">
            <text:p>217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1" table:style-name="ce1">
            <text:p>217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72" table:style-name="ce1">
            <text:p>217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73" table:style-name="ce1">
            <text:p>217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4" table:style-name="ce1">
            <text:p>217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5" table:style-name="ce1">
            <text:p>217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76" table:style-name="ce1">
            <text:p>217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77" table:style-name="ce1">
            <text:p>217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8" table:style-name="ce1">
            <text:p>217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9" table:style-name="ce1">
            <text:p>217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80" table:style-name="ce1">
            <text:p>218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81" table:style-name="ce1">
            <text:p>218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2" table:style-name="ce1">
            <text:p>218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3" table:style-name="ce1">
            <text:p>218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4" table:style-name="ce1">
            <text:p>218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5" table:style-name="ce1">
            <text:p>218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86" table:style-name="ce1">
            <text:p>218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87" table:style-name="ce1">
            <text:p>218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8" table:style-name="ce1">
            <text:p>218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9" table:style-name="ce1">
            <text:p>218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90" table:style-name="ce1">
            <text:p>219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91" table:style-name="ce1">
            <text:p>219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2" table:style-name="ce1">
            <text:p>219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3" table:style-name="ce1">
            <text:p>219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94" table:style-name="ce1">
            <text:p>219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95" table:style-name="ce1">
            <text:p>219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96" table:style-name="ce1">
            <text:p>219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97" table:style-name="ce1">
            <text:p>219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8" table:style-name="ce1">
            <text:p>219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9" table:style-name="ce1">
            <text:p>219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00" table:style-name="ce1">
            <text:p>220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01" table:style-name="ce1">
            <text:p>220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2" table:style-name="ce1">
            <text:p>220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3" table:style-name="ce1">
            <text:p>220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04" table:style-name="ce1">
            <text:p>220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05" table:style-name="ce1">
            <text:p>220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6" table:style-name="ce1">
            <text:p>220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7" table:style-name="ce1">
            <text:p>220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08" table:style-name="ce1">
            <text:p>220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09" table:style-name="ce1">
            <text:p>220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10" table:style-name="ce1">
            <text:p>221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11" table:style-name="ce1">
            <text:p>221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2" table:style-name="ce1">
            <text:p>221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3" table:style-name="ce1">
            <text:p>221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14" table:style-name="ce1">
            <text:p>221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15" table:style-name="ce1">
            <text:p>221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6" table:style-name="ce1">
            <text:p>221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7" table:style-name="ce1">
            <text:p>221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18" table:style-name="ce1">
            <text:p>221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19" table:style-name="ce1">
            <text:p>221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0" table:style-name="ce1">
            <text:p>222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1" table:style-name="ce1">
            <text:p>222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22" table:style-name="ce1">
            <text:p>222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23" table:style-name="ce1">
            <text:p>222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24" table:style-name="ce1">
            <text:p>222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25" table:style-name="ce1">
            <text:p>222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6" table:style-name="ce1">
            <text:p>222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7" table:style-name="ce1">
            <text:p>222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28" table:style-name="ce1">
            <text:p>222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29" table:style-name="ce1">
            <text:p>222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0" table:style-name="ce1">
            <text:p>223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1" table:style-name="ce1">
            <text:p>223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32" table:style-name="ce1">
            <text:p>223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33" table:style-name="ce1">
            <text:p>223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4" table:style-name="ce1">
            <text:p>223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5" table:style-name="ce1">
            <text:p>223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36" table:style-name="ce1">
            <text:p>223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37" table:style-name="ce1">
            <text:p>223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38" table:style-name="ce1">
            <text:p>223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39" table:style-name="ce1">
            <text:p>223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0" table:style-name="ce1">
            <text:p>224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1" table:style-name="ce1">
            <text:p>224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42" table:style-name="ce1">
            <text:p>224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43" table:style-name="ce1">
            <text:p>224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4" table:style-name="ce1">
            <text:p>224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5" table:style-name="ce1">
            <text:p>224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46" table:style-name="ce1">
            <text:p>224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47" table:style-name="ce1">
            <text:p>224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8" table:style-name="ce1">
            <text:p>224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9" table:style-name="ce1">
            <text:p>224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50" table:style-name="ce1">
            <text:p>225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51" table:style-name="ce1">
            <text:p>225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52" table:style-name="ce1">
            <text:p>225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53" table:style-name="ce1">
            <text:p>225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4" table:style-name="ce1">
            <text:p>225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5" table:style-name="ce1">
            <text:p>225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56" table:style-name="ce1">
            <text:p>225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57" table:style-name="ce1">
            <text:p>225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8" table:style-name="ce1">
            <text:p>225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9" table:style-name="ce1">
            <text:p>225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60" table:style-name="ce1">
            <text:p>226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61" table:style-name="ce1">
            <text:p>226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2" table:style-name="ce1">
            <text:p>226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3" table:style-name="ce1">
            <text:p>226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4" table:style-name="ce1">
            <text:p>226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5" table:style-name="ce1">
            <text:p>226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66" table:style-name="ce1">
            <text:p>226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67" table:style-name="ce1">
            <text:p>226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8" table:style-name="ce1">
            <text:p>226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9" table:style-name="ce1">
            <text:p>226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70" table:style-name="ce1">
            <text:p>227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71" table:style-name="ce1">
            <text:p>227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72" table:style-name="ce1">
            <text:p>227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number-rows-repeated="1046303" table:style-name="ro2">
          <table:table-cell table:number-columns-repeated="16384"/>
        </table:table-row>
      </table:table>
      <table:table table:name="Товар" table:style-name="ta2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78" table:default-cell-style-name="ce1"/>
        <table:table-row table:style-name="ro6">
          <table:table-cell office:value-type="string" table:style-name="ce3">
            <text:p>Артикул</text:p>
          </table:table-cell>
          <table:table-cell office:value-type="string" table:style-name="ce3">
            <text:p>Отдел</text:p>
          </table:table-cell>
          <table:table-cell office:value-type="string" table:style-name="ce3">
            <text:p>Наименование</text:p>
          </table:table-cell>
          <table:table-cell office:value-type="string" table:style-name="ce3">
            <text:p>Единица измерения</text:p>
          </table:table-cell>
          <table:table-cell office:value-type="string" table:style-name="ce3">
            <text:p>Количество в упаковке</text:p>
          </table:table-cell>
          <table:table-cell office:value-type="string" table:style-name="ce3">
            <text:p>Производитель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ультрапастеризованное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безлактозн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детское с 8 месяцев</text:p>
          </table:table-cell>
          <table:table-cell office:value-type="string" table:style-name="ce1">
            <text:p>литр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Кефир 3,2%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Кефир обезжиренный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Ряженка термостатная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ливки 10%</text:p>
          </table:table-cell>
          <table:table-cell office:value-type="string" table:style-name="ce1">
            <text:p>литр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ливки 35% для взбивания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метана 15%</text:p>
          </table:table-cell>
          <table:table-cell office:value-type="string" table:style-name="ce1">
            <text:p>литр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метана 25%</text:p>
          </table:table-cell>
          <table:table-cell office:value-type="string" table:style-name="ce1">
            <text:p>литр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кокосов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овсян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Творог 9% жирност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Творожок детский сладкий</text:p>
          </table:table-cell>
          <table:table-cell office:value-type="string" table:style-name="ce1">
            <text:p>кг</text:p>
          </table:table-cell>
          <table:table-cell office:value-type="float" office:value="0.1" table:style-name="ce1">
            <text:p>0,1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Яйцо диетическое</text:p>
          </table:table-cell>
          <table:table-cell office:value-type="string" table:style-name="ce1">
            <text:p>шт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тицеферма</text:p>
          </table:table-cell>
          <table:table-cell table:number-columns-repeated="16378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асло сливочное крестьянское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гречневая ядрица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ман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пшено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перлов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Рис круглозерн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Рис длиннозерн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Бурый рис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спагетти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вермишель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рожк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перь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песок бел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демерара коричнев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рафинад быстрорастворим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Лапша гречнев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Фунчоза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ука хлебопекарная в\с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ука блин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Горох желтый колот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ечевица крас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Хлопья овсяные Геркулес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Хлопья 4 злака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укурузные хлопья с сахаром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ль каменная помол №1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ль поваренная Экстра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ахмал картофель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да пищев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ай черный индийски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ай зеленый<text:s/>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растворимы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в зернах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молоты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вареная доктор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вареная любитель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ервелат варен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краков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молочны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венски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курины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ардельк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сырокопченая салям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Бекон варен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Бекон сыр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Грудинка копчен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Ветчина в оболочк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Паштет фермерский с грибам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Паштет из куриной печен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ливерная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number-rows-repeated="1048511" table:style-name="ro2">
          <table:table-cell table:number-columns-repeated="16384"/>
        </table:table-row>
      </table:table>
      <table:table table:name="Магазин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6" table:number-columns-repeated="16381" table:default-cell-style-name="ce1"/>
        <table:table-row table:style-name="ro2">
          <table:table-cell office:value-type="string" table:style-name="ce4">
            <text:p>ID магазина</text:p>
          </table:table-cell>
          <table:table-cell office:value-type="string" table:style-name="ce4">
            <text:p>Район</text:p>
          </table:table-cell>
          <table:table-cell office:value-type="string" table:style-name="ce4">
            <text:p>Адрес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1</text:p>
          </table:table-cell>
          <table:table-cell office:value-type="string" table:style-name="ce5">
            <text:p>Октябрьский</text:p>
          </table:table-cell>
          <table:table-cell office:value-type="string" table:style-name="ce5">
            <text:p>просп. Мира, 4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2</text:p>
          </table:table-cell>
          <table:table-cell office:value-type="string" table:style-name="ce5">
            <text:p>Первомайский</text:p>
          </table:table-cell>
          <table:table-cell office:value-type="string" table:style-name="ce5">
            <text:p>ул. Металлургов, 1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3</text:p>
          </table:table-cell>
          <table:table-cell office:value-type="string" table:style-name="ce5">
            <text:p>Заречный</text:p>
          </table:table-cell>
          <table:table-cell office:value-type="string" table:style-name="ce5">
            <text:p>Колхозная, 1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4</text:p>
          </table:table-cell>
          <table:table-cell office:value-type="string" table:style-name="ce5">
            <text:p>Первомайский</text:p>
          </table:table-cell>
          <table:table-cell office:value-type="string" table:style-name="ce5">
            <text:p>Заводская, 2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5</text:p>
          </table:table-cell>
          <table:table-cell office:value-type="string" table:style-name="ce5">
            <text:p>Октябрьский</text:p>
          </table:table-cell>
          <table:table-cell office:value-type="string" table:style-name="ce5">
            <text:p>ул. Гагарина, 1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6</text:p>
          </table:table-cell>
          <table:table-cell office:value-type="string" table:style-name="ce5">
            <text:p>Октябрьский</text:p>
          </table:table-cell>
          <table:table-cell office:value-type="string" table:style-name="ce5">
            <text:p>просп. Мира, 1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7</text:p>
          </table:table-cell>
          <table:table-cell office:value-type="string" table:style-name="ce5">
            <text:p>Первомайский</text:p>
          </table:table-cell>
          <table:table-cell office:value-type="string" table:style-name="ce5">
            <text:p>Заводская, 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8</text:p>
          </table:table-cell>
          <table:table-cell office:value-type="string" table:style-name="ce5">
            <text:p>Первомайский</text:p>
          </table:table-cell>
          <table:table-cell office:value-type="string" table:style-name="ce5">
            <text:p>ул. Сталеваров, 1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9</text:p>
          </table:table-cell>
          <table:table-cell office:value-type="string" table:style-name="ce5">
            <text:p>Заречный</text:p>
          </table:table-cell>
          <table:table-cell office:value-type="string" table:style-name="ce5">
            <text:p>Прибрежная, 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10</text:p>
          </table:table-cell>
          <table:table-cell office:value-type="string" table:style-name="ce5">
            <text:p>Октябрьский</text:p>
          </table:table-cell>
          <table:table-cell office:value-type="string" table:style-name="ce5">
            <text:p>пл. Революции, 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11</text:p>
          </table:table-cell>
          <table:table-cell office:value-type="string" table:style-name="ce5">
            <text:p>Заречный</text:p>
          </table:table-cell>
          <table:table-cell office:value-type="string" table:style-name="ce5">
            <text:p>Луговая, 2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12</text:p>
          </table:table-cell>
          <table:table-cell office:value-type="string" table:style-name="ce5">
            <text:p>Первомайский</text:p>
          </table:table-cell>
          <table:table-cell office:value-type="string" table:style-name="ce5">
            <text:p>Мартеновская, 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13</text:p>
          </table:table-cell>
          <table:table-cell office:value-type="string" table:style-name="ce5">
            <text:p>Первомайский</text:p>
          </table:table-cell>
          <table:table-cell office:value-type="string" table:style-name="ce5">
            <text:p>Мартеновская, 3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14</text:p>
          </table:table-cell>
          <table:table-cell office:value-type="string" table:style-name="ce5">
            <text:p>Заречный</text:p>
          </table:table-cell>
          <table:table-cell office:value-type="string" table:style-name="ce5">
            <text:p>Элеваторная, 1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15</text:p>
          </table:table-cell>
          <table:table-cell office:value-type="string" table:style-name="ce5">
            <text:p>Октябрьский</text:p>
          </table:table-cell>
          <table:table-cell office:value-type="string" table:style-name="ce5">
            <text:p>Пушкинская, 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16</text:p>
          </table:table-cell>
          <table:table-cell office:value-type="string" table:style-name="ce5">
            <text:p>Первомайский</text:p>
          </table:table-cell>
          <table:table-cell office:value-type="string" table:style-name="ce5">
            <text:p>ул. Металлургов. 29</text:p>
          </table:table-cell>
          <table:table-cell table:number-columns-repeated="16381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Слава</meta:initial-creator>
    <dc:creator>Валентина Котельникова</dc:creator>
    <meta:creation-date>2021-07-09T17:04:06Z</meta:creation-date>
    <dc:date>2025-10-06T08:19:51Z</dc:date>
  </office:meta>
</office:document-meta>
</file>